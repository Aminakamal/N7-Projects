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122096CB170A057F25C.png" manifest:media-type="image/png"/>
  <manifest:file-entry manifest:full-path="Pictures/10000001000002470000011DC5D2BE66E7E57C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54ae1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55d7bc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5d7bc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917d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de35c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612141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669ad1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460a9c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8d92" style:font-weight-asian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54ae1e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0a9c" style:font-weight-asian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55d7bc" officeooo:paragraph-rsid="0055d7bc" style:font-weight-asian="normal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55d7bc" officeooo:paragraph-rsid="00571da2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5e4e0e" officeooo:paragraph-rsid="00669ad1" style:font-weight-asian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669ad1" officeooo:paragraph-rsid="00669ad1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paragraph-rsid="0042e6d8"/>
    </style:style>
    <style:style style:name="P22" style:family="paragraph" style:parent-style-name="Heading">
      <style:paragraph-properties fo:text-align="center" style:justify-single-word="false"/>
      <style:text-properties officeooo:paragraph-rsid="0042e6d8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571da2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55d7bc" officeooo:paragraph-rsid="0055d7bc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571da2" officeooo:paragraph-rsid="00571da2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2c0158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62f31f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268c58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253e73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62f31f" officeooo:paragraph-rsid="0062f31f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32" style:family="paragraph" style:parent-style-name="Text_20_body" style:master-page-name="">
      <loext:graphic-properties draw:fill="none"/>
      <style:paragraph-properties fo:margin-left="1.3cm" fo:margin-right="0cm" fo:margin-top="0cm" fo:margin-bottom="0.212cm" style:contextual-spacing="false" fo:text-indent="-1.499cm" style:auto-text-indent="false" style:page-number="auto" fo:background-color="transparent"/>
      <style:text-properties officeooo:rsid="002c0158" officeooo:paragraph-rsid="002c0158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5f2b37" officeooo:paragraph-rsid="005f2b37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paragraph-rsid="0042e6d8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268c58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571da2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26f44" officeooo:paragraph-rsid="00126f44" style:font-weight-asian="bold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126f44" style:font-weight-asian="bold" style:font-weight-complex="bol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55d7bc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6ee017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42386a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5d7bc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71da2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53e73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612141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62f31f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571da2"/>
    </style:style>
    <style:style style:name="P52" style:family="paragraph" style:parent-style-name="Text_20_body" style:list-style-name="L1">
      <style:text-properties officeooo:rsid="00571da2" officeooo:paragraph-rsid="005f2b37"/>
    </style:style>
    <style:style style:name="P53" style:family="paragraph" style:parent-style-name="Text_20_body" style:list-style-name="L1">
      <style:text-properties officeooo:rsid="00571da2" officeooo:paragraph-rsid="005bf8fc"/>
    </style:style>
    <style:style style:name="P54" style:family="paragraph" style:parent-style-name="Text_20_body" style:list-style-name="L1">
      <style:text-properties officeooo:rsid="005bf8fc" officeooo:paragraph-rsid="005bf8fc"/>
    </style:style>
    <style:style style:name="P55" style:family="paragraph" style:parent-style-name="Text_20_body" style:list-style-name="L1">
      <style:text-properties officeooo:rsid="005bf8fc" officeooo:paragraph-rsid="005f2b37"/>
    </style:style>
    <style:style style:name="P56" style:family="paragraph" style:parent-style-name="Text_20_body" style:list-style-name="L1">
      <style:text-properties officeooo:rsid="00687cba" officeooo:paragraph-rsid="00687cba"/>
    </style:style>
    <style:style style:name="P57" style:family="paragraph" style:parent-style-name="Text_20_body" style:list-style-name="L1">
      <style:text-properties officeooo:rsid="005f2b37" officeooo:paragraph-rsid="005f2b37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rsid="0055d7bc" officeooo:paragraph-rsid="0055d7bc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rsid="00332b72" officeooo:paragraph-rsid="0055d7bc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68c58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54ae1e" officeooo:paragraph-rsid="006dd962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54ae1e" officeooo:paragraph-rsid="006ee017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paragraph-rsid="002c0158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61bc06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62f31f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2a081a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5de35c" officeooo:paragraph-rsid="00253e73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42386a" officeooo:paragraph-rsid="0042386a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paragraph-rsid="00268c58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paragraph-rsid="00253e73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2dc7a1" officeooo:paragraph-rsid="002dc7a1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officeooo:rsid="00253e73"/>
    </style:style>
    <style:style style:name="T5" style:family="text">
      <style:text-properties officeooo:rsid="00279058"/>
    </style:style>
    <style:style style:name="T6" style:family="text">
      <style:text-properties officeooo:rsid="002869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69ce" style:font-weight-asian="bold" style:font-weight-complex="bold"/>
    </style:style>
    <style:style style:name="T9" style:family="text">
      <style:text-properties fo:font-weight="bold" officeooo:rsid="00612141" style:font-weight-asian="bold" style:font-weight-complex="bold"/>
    </style:style>
    <style:style style:name="T10" style:family="text">
      <style:text-properties officeooo:rsid="002a081a"/>
    </style:style>
    <style:style style:name="T11" style:family="text">
      <style:text-properties officeooo:rsid="002b79f9"/>
    </style:style>
    <style:style style:name="T12" style:family="text">
      <style:text-properties officeooo:rsid="002c0158"/>
    </style:style>
    <style:style style:name="T13" style:family="text">
      <style:text-properties officeooo:rsid="002dc7a1"/>
    </style:style>
    <style:style style:name="T14" style:family="text">
      <style:text-properties officeooo:rsid="002e62ab"/>
    </style:style>
    <style:style style:name="T15" style:family="text">
      <style:text-properties officeooo:rsid="00304207"/>
    </style:style>
    <style:style style:name="T16" style:family="text">
      <style:text-properties officeooo:rsid="0039346e"/>
    </style:style>
    <style:style style:name="T17" style:family="text">
      <style:text-properties officeooo:rsid="003a3d27"/>
    </style:style>
    <style:style style:name="T18" style:family="text">
      <style:text-properties officeooo:rsid="003b5fe2"/>
    </style:style>
    <style:style style:name="T19" style:family="text">
      <style:text-properties officeooo:rsid="003cc92a"/>
    </style:style>
    <style:style style:name="T20" style:family="text">
      <style:text-properties officeooo:rsid="003d78e2"/>
    </style:style>
    <style:style style:name="T21" style:family="text">
      <style:text-properties officeooo:rsid="003eaa21"/>
    </style:style>
    <style:style style:name="T22" style:family="text">
      <style:text-properties officeooo:rsid="00448098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460a9c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a081a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279058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571da2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5e4e0e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5f2b37" style:font-weight-asian="bold" style:font-weight-complex="bold"/>
    </style:style>
    <style:style style:name="T30" style:family="text">
      <style:text-properties officeooo:rsid="004bbe4b"/>
    </style:style>
    <style:style style:name="T31" style:family="text">
      <style:text-properties officeooo:rsid="004d8095"/>
    </style:style>
    <style:style style:name="T32" style:family="text">
      <style:text-properties officeooo:rsid="00535b29"/>
    </style:style>
    <style:style style:name="T33" style:family="text">
      <style:text-properties officeooo:rsid="0054ae1e"/>
    </style:style>
    <style:style style:name="T34" style:family="text">
      <style:text-properties officeooo:rsid="00571da2"/>
    </style:style>
    <style:style style:name="T35" style:family="text">
      <style:text-properties officeooo:rsid="005917de"/>
    </style:style>
    <style:style style:name="T36" style:family="text">
      <style:text-properties officeooo:rsid="00598fc8"/>
    </style:style>
    <style:style style:name="T37" style:family="text">
      <style:text-properties officeooo:rsid="00268c58"/>
    </style:style>
    <style:style style:name="T38" style:family="text">
      <style:text-properties officeooo:rsid="0035faf9"/>
    </style:style>
    <style:style style:name="T39" style:family="text">
      <style:text-properties officeooo:rsid="005bf8fc"/>
    </style:style>
    <style:style style:name="T40" style:family="text">
      <style:text-properties officeooo:rsid="005de35c"/>
    </style:style>
    <style:style style:name="T41" style:family="text">
      <style:text-properties officeooo:rsid="005e4e0e"/>
    </style:style>
    <style:style style:name="T42" style:family="text">
      <style:text-properties officeooo:rsid="005f2b37"/>
    </style:style>
    <style:style style:name="T43" style:family="text">
      <style:text-properties officeooo:rsid="00612141"/>
    </style:style>
    <style:style style:name="T44" style:family="text">
      <style:text-properties officeooo:rsid="0061bc06"/>
    </style:style>
    <style:style style:name="T45" style:family="text">
      <style:text-properties officeooo:rsid="0062f31f"/>
    </style:style>
    <style:style style:name="T46" style:family="text">
      <style:text-properties officeooo:rsid="0064b46f"/>
    </style:style>
    <style:style style:name="T47" style:family="text">
      <style:text-properties officeooo:rsid="00669ad1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5e4e0e" style:font-weight-asian="normal" style:font-weight-complex="normal"/>
    </style:style>
    <style:style style:name="T50" style:family="text">
      <style:text-properties style:text-underline-style="none" fo:font-weight="normal" officeooo:rsid="0042e6d8" style:font-weight-asian="normal" style:font-weight-complex="normal"/>
    </style:style>
    <style:style style:name="T51" style:family="text">
      <style:text-properties officeooo:rsid="006a669c"/>
    </style:style>
    <style:style style:name="T52" style:family="text">
      <style:text-properties officeooo:rsid="006c3183"/>
    </style:style>
    <style:style style:name="T53" style:family="text">
      <style:text-properties fo:font-size="11pt" officeooo:rsid="00253e73" style:font-size-asian="11pt" style:font-size-complex="11pt"/>
    </style:style>
    <style:style style:name="T54" style:family="text">
      <style:text-properties fo:font-size="11pt" officeooo:rsid="005de35c" style:font-size-asian="11pt" style:font-size-complex="11pt"/>
    </style:style>
    <style:style style:name="T55" style:family="text">
      <style:text-properties fo:font-size="11pt" officeooo:rsid="004bbe4b" style:font-size-asian="11pt" style:font-size-complex="11pt"/>
    </style:style>
    <style:style style:name="T5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08432211495088" text:id="ct108432211495088">
          <text:insertion>
            <office:change-info>
              <dc:creator>Auteur inconnu</dc:creator>
              <dc:date>2024-11-24T15:31:17</dc:date>
            </office:change-info>
          </text:insertion>
        </text:changed-region>
        <text:changed-region xml:id="ct108432211489856" text:id="ct108432211489856">
          <text:deletion>
            <office:change-info>
              <dc:creator>Auteur inconnu</dc:creator>
              <dc:date>2024-11-24T15:31:16</dc:date>
            </office:change-info>
            <text:p text:style-name="P21"><text:span text:style-name="T33"><text:s text:c="4"/></text:span></text:p>
          </text:deletion>
        </text:changed-region>
        <text:changed-region xml:id="ct108432211498080" text:id="ct108432211498080">
          <text:insertion>
            <office:change-info>
              <dc:creator>Auteur inconnu</dc:creator>
              <dc:date>2024-11-24T13:33:57</dc:date>
            </office:change-info>
          </text:insertion>
        </text:changed-region>
        <text:changed-region xml:id="ct108432211546784" text:id="ct108432211546784">
          <text:deletion>
            <office:change-info>
              <dc:creator>Auteur inconnu</dc:creator>
              <dc:date>2024-11-24T13:33:56</dc:date>
            </office:change-info>
            <text:p text:style-name="P21"><text:span text:style-name="T1">h</text:span></text:p>
          </text:deletion>
        </text:changed-region>
        <text:changed-region xml:id="ct108432211958944" text:id="ct108432211958944">
          <text:insertion>
            <office:change-info>
              <dc:creator>Auteur inconnu</dc:creator>
              <dc:date>2024-11-24T13:33:58</dc:date>
            </office:change-info>
          </text:insertion>
        </text:changed-region>
        <text:changed-region xml:id="ct108432211960544" text:id="ct108432211960544">
          <text:insertion>
            <office:change-info>
              <dc:creator>Auteur inconnu</dc:creator>
              <dc:date>2024-11-24T13:34:00</dc:date>
            </office:change-info>
          </text:insertion>
        </text:changed-region>
        <text:changed-region xml:id="ct108432211960960" text:id="ct108432211960960">
          <text:deletion>
            <office:change-info>
              <dc:creator>Auteur inconnu</dc:creator>
              <dc:date>2024-11-24T13:34:02</dc:date>
            </office:change-info>
            <text:p text:style-name="P21">enseeiht</text:p>
          </text:deletion>
        </text:changed-region>
        <text:changed-region xml:id="ct108432211962448" text:id="ct108432211962448">
          <text:insertion>
            <office:change-info>
              <dc:creator>Auteur inconnu</dc:creator>
              <dc:date>2024-11-24T13:34:02</dc:date>
            </office:change-info>
          </text:insertion>
        </text:changed-region>
        <text:changed-region xml:id="ct108432211963872" text:id="ct108432211963872">
          <text:insertion>
            <office:change-info>
              <dc:creator>Auteur inconnu</dc:creator>
              <dc:date>2024-11-24T15:31:19</dc:date>
            </office:change-info>
          </text:insertion>
        </text:changed-region>
        <text:changed-region xml:id="ct108432211965408" text:id="ct108432211965408">
          <text:deletion>
            <office:change-info>
              <dc:creator>Auteur inconnu</dc:creator>
              <dc:date>2024-11-24T18:24:59</dc:date>
            </office:change-info>
            <text:p text:style-name="P28"><text:span text:style-name="T37">L'objectif de ce TP est l'initiation à l'utilisation des Web services (WS). Nous allons utiliser les WS </text:span></text:p>
          </text:deletion>
        </text:changed-region>
        <text:changed-region xml:id="ct108432211965888" text:id="ct108432211965888">
          <text:deletion>
            <office:change-info>
              <dc:creator>Auteur inconnu</dc:creator>
              <dc:date>2024-11-24T13:34:26</dc:date>
            </office:change-info>
            <text:p text:style-name="P28"><text:span text:style-name="T37">suivant les 2 modes vus en cours : SOAP et</text:span></text:p>
          </text:deletion>
        </text:changed-region>
        <text:changed-region xml:id="ct108432211966128" text:id="ct108432211966128">
          <text:deletion>
            <office:change-info>
              <dc:creator>Auteur inconnu</dc:creator>
              <dc:date>2024-11-24T18:24:59</dc:date>
            </office:change-info>
            <text:p text:style-name="P28"><text:span text:style-name="T37"><text:s/>REST.</text:span></text:p>
          </text:deletion>
        </text:changed-region>
        <text:changed-region xml:id="ct108432211966368" text:id="ct108432211966368">
          <text:insertion>
            <office:change-info>
              <dc:creator>Auteur inconnu</dc:creator>
              <dc:date>2024-11-24T18:25:00</dc:date>
            </office:change-info>
          </text:insertion>
        </text:changed-region>
        <text:changed-region xml:id="ct108432211965648" text:id="ct108432211965648">
          <text:insertion>
            <office:change-info>
              <dc:creator>Auteur inconnu</dc:creator>
              <dc:date>2020-12-04T07:29:15</dc:date>
            </office:change-info>
          </text:insertion>
        </text:changed-region>
        <text:changed-region xml:id="ct108432211967456" text:id="ct108432211967456">
          <text:insertion>
            <office:change-info>
              <dc:creator>Auteur inconnu</dc:creator>
              <dc:date>2024-11-24T18:25:51</dc:date>
            </office:change-info>
          </text:insertion>
        </text:changed-region>
        <text:changed-region xml:id="ct108432211968128" text:id="ct108432211968128">
          <text:insertion>
            <office:change-info>
              <dc:creator>Auteur inconnu</dc:creator>
              <dc:date>2020-12-04T07:29:15</dc:date>
            </office:change-info>
          </text:insertion>
        </text:changed-region>
        <text:changed-region xml:id="ct108432211980000" text:id="ct108432211980000">
          <text:insertion>
            <office:change-info>
              <dc:creator>Auteur inconnu</dc:creator>
              <dc:date>2024-11-24T15:46:03</dc:date>
            </office:change-info>
          </text:insertion>
        </text:changed-region>
        <text:changed-region xml:id="ct108432211980752" text:id="ct108432211980752">
          <text:deletion>
            <office:change-info>
              <dc:creator>Auteur inconnu</dc:creator>
              <dc:date>2020-12-04T07:39:13</dc:date>
            </office:change-info>
            <text:p text:style-name="P24"><text:span text:style-name="T48"/></text:p>
            <text:p text:style-name="P59">Dans le TP, vous devez utiliser la version de Tomcat mise à disposition sur les machines de l’N7 (version dans laquelle nous avons ajouté les jars de Resteasy). </text:p>
          </text:deletion>
        </text:changed-region>
        <text:changed-region xml:id="ct108432211981424" text:id="ct108432211981424">
          <text:deletion>
            <office:change-info>
              <dc:creator>Auteur inconnu</dc:creator>
              <dc:date>2024-11-24T15:34:57</dc:date>
            </office:change-info>
            <text:p text:style-name="P59"><text:span text:style-name="T38">Pour utiliser Resteasy, inclure tous les jar du répertoire lib de Tomcat.</text:span></text:p>
          </text:deletion>
        </text:changed-region>
        <text:changed-region xml:id="ct108432211624992" text:id="ct108432211624992">
          <text:deletion>
            <office:change-info>
              <dc:creator>Auteur inconnu</dc:creator>
              <dc:date>2024-11-24T15:43:12</dc:date>
            </office:change-info>
            <text:p text:style-name="P59"><text:span text:style-name="T48"/></text:p>
            <text:p text:style-name="P60"/>
          </text:deletion>
        </text:changed-region>
        <text:changed-region xml:id="ct108432211981664" text:id="ct108432211981664">
          <text:deletion>
            <office:change-info>
              <dc:creator>Auteur inconnu</dc:creator>
              <dc:date>2020-12-04T07:39:34</dc:date>
            </office:change-info>
            <text:p text:style-name="P60">NB : normalement vous pouvez lancer Tomcat depuis un terminal ou le lancer dans Eclipse.</text:p>
          </text:deletion>
        </text:changed-region>
        <text:changed-region xml:id="ct108432211982160" text:id="ct108432211982160">
          <text:deletion>
            <office:change-info>
              <dc:creator>Auteur inconnu</dc:creator>
              <dc:date>2020-12-04T07:40:25</dc:date>
            </office:change-info>
            <text:p text:style-name="P60"><text:span text:style-name="T48"/></text:p>
            <text:p text:style-name="P60"><text:span text:style-name="T48"/></text:p>
          </text:deletion>
        </text:changed-region>
        <text:changed-region xml:id="ct108432211958384" text:id="ct108432211958384">
          <text:deletion>
            <office:change-info>
              <dc:creator>Auteur inconnu</dc:creator>
              <dc:date>2024-11-24T15:59:11</dc:date>
            </office:change-info>
            <text:p text:style-name="P35"><text:span text:style-name="T23">Utilisation</text:span></text:p>
          </text:deletion>
        </text:changed-region>
        <text:changed-region xml:id="ct108432211959264" text:id="ct108432211959264">
          <text:deletion>
            <office:change-info>
              <dc:creator>Auteur inconnu</dc:creator>
              <dc:date>2024-11-24T18:28:09</dc:date>
            </office:change-info>
            <text:p text:style-name="P35"><text:span text:style-name="T23"><text:s/>d’un WS</text:span></text:p>
          </text:deletion>
        </text:changed-region>
        <text:changed-region xml:id="ct108432211961456" text:id="ct108432211961456">
          <text:insertion>
            <office:change-info>
              <dc:creator>Auteur inconnu</dc:creator>
              <dc:date>2024-11-24T18:28:09</dc:date>
            </office:change-info>
          </text:insertion>
        </text:changed-region>
        <text:changed-region xml:id="ct108432211956736" text:id="ct108432211956736">
          <text:insertion>
            <office:change-info>
              <dc:creator>Auteur inconnu</dc:creator>
              <dc:date>2024-11-24T16:00:09</dc:date>
            </office:change-info>
          </text:insertion>
        </text:changed-region>
        <text:changed-region xml:id="ct108432211983440" text:id="ct108432211983440">
          <text:deletion>
            <office:change-info>
              <dc:creator>Auteur inconnu</dc:creator>
              <dc:date>2024-11-24T15:59:22</dc:date>
            </office:change-info>
            <text:p text:style-name="P35"><text:span text:style-name="T23"><text:s/></text:span><text:span text:style-name="T26">REST + Json</text:span></text:p>
          </text:deletion>
        </text:changed-region>
        <text:changed-region xml:id="ct108432211984048" text:id="ct108432211984048">
          <text:deletion>
            <office:change-info>
              <dc:creator>Auteur inconnu</dc:creator>
              <dc:date>2024-11-24T15:35:37</dc:date>
            </office:change-info>
            <text:p text:style-name="P35"><text:span text:style-name="T26"/></text:p>
            <text:p text:style-name="P61">Nous utilisons les outils Resteasy pour implanter les parties clientes comme serveurs.</text:p>
          </text:deletion>
        </text:changed-region>
        <text:changed-region xml:id="ct108432211645856" text:id="ct108432211645856">
          <text:deletion>
            <office:change-info>
              <dc:creator>Auteur inconnu</dc:creator>
              <dc:date>2024-11-24T18:29:13</dc:date>
            </office:change-info>
            <text:p text:style-name="P61"><text:span text:style-name="T26"/></text:p>
            <text:p text:style-name="P61">Un WS Restful a été implanté. </text:p>
          </text:deletion>
        </text:changed-region>
        <text:changed-region xml:id="ct108432211646224" text:id="ct108432211646224">
          <text:insertion>
            <office:change-info>
              <dc:creator>Auteur inconnu</dc:creator>
              <dc:date>2024-11-24T15:39:22</dc:date>
            </office:change-info>
          </text:insertion>
        </text:changed-region>
        <text:changed-region xml:id="ct108432211985728" text:id="ct108432211985728">
          <text:insertion>
            <office:change-info>
              <dc:creator>Auteur inconnu</dc:creator>
              <dc:date>2024-11-24T18:28:51</dc:date>
            </office:change-info>
          </text:insertion>
        </text:changed-region>
        <text:changed-region xml:id="ct108432211987440" text:id="ct108432211987440">
          <text:insertion>
            <office:change-info>
              <dc:creator>Auteur inconnu</dc:creator>
              <dc:date>2024-11-24T15:39:22</dc:date>
            </office:change-info>
          </text:insertion>
        </text:changed-region>
        <text:changed-region xml:id="ct108432211987728" text:id="ct108432211987728">
          <text:insertion>
            <office:change-info>
              <dc:creator>Auteur inconnu</dc:creator>
              <dc:date>2024-11-24T18:29:32</dc:date>
            </office:change-info>
          </text:insertion>
        </text:changed-region>
        <text:changed-region xml:id="ct108432211996480" text:id="ct108432211996480">
          <text:insertion>
            <office:change-info>
              <dc:creator>Auteur inconnu</dc:creator>
              <dc:date>2024-11-24T15:39:22</dc:date>
            </office:change-info>
          </text:insertion>
        </text:changed-region>
        <text:changed-region xml:id="ct108432211996720" text:id="ct108432211996720">
          <text:deletion>
            <office:change-info>
              <dc:creator>Auteur inconnu</dc:creator>
              <dc:date>2024-11-24T15:42:00</dc:date>
            </office:change-info>
            <text:p text:style-name="P40"><text:span text:style-name="T5">Si vous le deployez localement dans votre Tomcat, il est accessible à l’URL : </text:span><text:a xlink:type="simple" xlink:href="http://localhost:8080/students-server/rest/" text:style-name="Internet_20_link" text:visited-style-name="Visited_20_Internet_20_Link">http://localhost:8080/students-server/rest/</text:a></text:p>
          </text:deletion>
        </text:changed-region>
        <text:changed-region xml:id="ct108432160250352" text:id="ct108432160250352">
          <text:insertion>
            <office:change-info>
              <dc:creator>Auteur inconnu</dc:creator>
              <dc:date>2025-11-22T14:16:53</dc:date>
            </office:change-info>
          </text:insertion>
        </text:changed-region>
        <text:changed-region xml:id="ct108432211997232" text:id="ct108432211997232">
          <text:insertion>
            <office:change-info>
              <dc:creator>Auteur inconnu</dc:creator>
              <dc:date>2025-11-06T08:09:28</dc:date>
            </office:change-info>
          </text:insertion>
        </text:changed-region>
        <text:changed-region xml:id="ct108432211997680" text:id="ct108432211997680">
          <text:deletion>
            <office:change-info>
              <dc:creator>Auteur inconnu</dc:creator>
              <dc:date>2024-11-24T15:42:00</dc:date>
            </office:change-info>
            <text:p text:style-name="P40"/>
            <text:p text:style-name="P62"/>
          </text:deletion>
        </text:changed-region>
        <text:changed-region xml:id="ct108432211997920" text:id="ct108432211997920">
          <text:deletion>
            <office:change-info>
              <dc:creator>Auteur inconnu</dc:creator>
              <dc:date>2024-11-24T15:40:30</dc:date>
            </office:change-info>
            <text:p text:style-name="P62">Il propose 2 interfaces :</text:p>
            <text:p text:style-name="P62">Méthode <text:span text:style-name="T7">getstudent</text:span>, paramètre<text:span text:style-name="T6">s</text:span> <text:span text:style-name="T7">firstname</text:span> et <text:span text:style-name="T7">lastname </text:span>, retourne un <text:span text:style-name="T7">Json</text:span>.</text:p>
            <text:p text:style-name="P7">Exemple d’appel :</text:p>
          </text:deletion>
        </text:changed-region>
        <text:changed-region xml:id="ct108432211998160" text:id="ct108432211998160">
          <text:deletion>
            <office:change-info>
              <dc:creator>Auteur inconnu</dc:creator>
              <dc:date>2024-11-24T15:42:00</dc:date>
            </office:change-info>
            <text:p text:style-name="P7"/>
            <text:p text:style-name="P40">http://localhost:8080/students-server/rest/getstudent?firstname=Alain&amp;lastname=Tchana</text:p>
          </text:deletion>
        </text:changed-region>
        <text:changed-region xml:id="ct108432242213776" text:id="ct108432242213776">
          <text:insertion>
            <office:change-info>
              <dc:creator>Auteur inconnu</dc:creator>
              <dc:date>2025-11-22T14:17:22</dc:date>
            </office:change-info>
          </text:insertion>
        </text:changed-region>
        <text:changed-region xml:id="ct108432211958624" text:id="ct108432211958624">
          <text:deletion>
            <office:change-info>
              <dc:creator>Auteur inconnu</dc:creator>
              <dc:date>2024-11-24T15:47:59</dc:date>
            </office:change-info>
            <text:p text:style-name="Standard"/>
            <text:p text:style-name="Standard"/>
          </text:deletion>
        </text:changed-region>
        <text:changed-region xml:id="ct108432212005504" text:id="ct108432212005504">
          <text:insertion>
            <office:change-info>
              <dc:creator>Auteur inconnu</dc:creator>
              <dc:date>2024-11-24T18:30:42</dc:date>
            </office:change-info>
          </text:insertion>
        </text:changed-region>
        <text:changed-region xml:id="ct108432212005744" text:id="ct108432212005744">
          <text:deletion>
            <office:change-info>
              <dc:creator>Auteur inconnu</dc:creator>
              <dc:date>2024-11-24T18:30:41</dc:date>
            </office:change-info>
            <text:p text:style-name="P2">é</text:p>
          </text:deletion>
        </text:changed-region>
        <text:changed-region xml:id="ct108432212005984" text:id="ct108432212005984">
          <text:deletion>
            <office:change-info>
              <dc:creator>Auteur inconnu</dc:creator>
              <dc:date>2024-11-24T18:30:40</dc:date>
            </office:change-info>
            <text:p text:style-name="P2">e </text:p>
          </text:deletion>
        </text:changed-region>
        <text:changed-region xml:id="ct108432212006224" text:id="ct108432212006224">
          <text:insertion>
            <office:change-info>
              <dc:creator>Auteur inconnu</dc:creator>
              <dc:date>2024-11-24T18:30:40</dc:date>
            </office:change-info>
          </text:insertion>
        </text:changed-region>
        <text:changed-region xml:id="ct108432212007616" text:id="ct108432212007616">
          <text:insertion>
            <office:change-info>
              <dc:creator>Auteur inconnu</dc:creator>
              <dc:date>2024-11-24T18:31:00</dc:date>
            </office:change-info>
          </text:insertion>
        </text:changed-region>
        <text:changed-region xml:id="ct108432212008864" text:id="ct108432212008864">
          <text:insertion>
            <office:change-info>
              <dc:creator>Auteur inconnu</dc:creator>
              <dc:date>2024-11-24T18:31:04</dc:date>
            </office:change-info>
          </text:insertion>
        </text:changed-region>
        <text:changed-region xml:id="ct108432212009440" text:id="ct108432212009440">
          <text:deletion>
            <office:change-info>
              <dc:creator>Auteur inconnu</dc:creator>
              <dc:date>2024-11-24T18:31:03</dc:date>
            </office:change-info>
            <text:p text:style-name="P2">ètre</text:p>
          </text:deletion>
        </text:changed-region>
        <text:changed-region xml:id="ct108432212010640" text:id="ct108432212010640">
          <text:deletion>
            <office:change-info>
              <dc:creator>Auteur inconnu</dc:creator>
              <dc:date>2024-11-24T18:31:07</dc:date>
            </office:change-info>
            <text:p text:style-name="P2">retourne</text:p>
          </text:deletion>
        </text:changed-region>
        <text:changed-region xml:id="ct108432212012160" text:id="ct108432212012160">
          <text:insertion>
            <office:change-info>
              <dc:creator>Auteur inconnu</dc:creator>
              <dc:date>2024-11-24T18:31:07</dc:date>
            </office:change-info>
          </text:insertion>
        </text:changed-region>
        <text:changed-region xml:id="ct108432212012736" text:id="ct108432212012736">
          <text:deletion>
            <office:change-info>
              <dc:creator>Auteur inconnu</dc:creator>
              <dc:date>2024-11-24T18:31:10</dc:date>
            </office:change-info>
            <text:p text:style-name="P2">un</text:p>
          </text:deletion>
        </text:changed-region>
        <text:changed-region xml:id="ct108432212013920" text:id="ct108432212013920">
          <text:insertion>
            <office:change-info>
              <dc:creator>Auteur inconnu</dc:creator>
              <dc:date>2024-11-24T18:31:10</dc:date>
            </office:change-info>
          </text:insertion>
        </text:changed-region>
        <text:changed-region xml:id="ct108432211961952" text:id="ct108432211961952">
          <text:insertion>
            <office:change-info>
              <dc:creator>Auteur inconnu</dc:creator>
              <dc:date>2024-11-24T18:31:15</dc:date>
            </office:change-info>
          </text:insertion>
        </text:changed-region>
        <text:changed-region xml:id="ct108432212016160" text:id="ct108432212016160">
          <text:deletion>
            <office:change-info>
              <dc:creator>Auteur inconnu</dc:creator>
              <dc:date>2024-11-24T18:31:15</dc:date>
            </office:change-info>
            <text:p text:style-name="P6">Exe</text:p>
          </text:deletion>
        </text:changed-region>
        <text:changed-region xml:id="ct108432212016400" text:id="ct108432212016400">
          <text:insertion>
            <office:change-info>
              <dc:creator>Auteur inconnu</dc:creator>
              <dc:date>2024-11-24T18:31:16</dc:date>
            </office:change-info>
          </text:insertion>
        </text:changed-region>
        <text:changed-region xml:id="ct108432212016640" text:id="ct108432212016640">
          <text:deletion>
            <office:change-info>
              <dc:creator>Auteur inconnu</dc:creator>
              <dc:date>2024-11-24T18:31:23</dc:date>
            </office:change-info>
            <text:p text:style-name="P6"><text:s/>d’appel </text:p>
          </text:deletion>
        </text:changed-region>
        <text:changed-region xml:id="ct108432212017616" text:id="ct108432212017616">
          <text:insertion>
            <office:change-info>
              <dc:creator>Auteur inconnu</dc:creator>
              <dc:date>2024-11-24T15:43:48</dc:date>
            </office:change-info>
          </text:insertion>
        </text:changed-region>
        <text:changed-region xml:id="ct108432212017856" text:id="ct108432212017856">
          <text:deletion>
            <office:change-info>
              <dc:creator>Auteur inconnu</dc:creator>
              <dc:date>2024-11-24T15:44:14</dc:date>
            </office:change-info>
            <text:p text:style-name="P65"/>
            <text:p text:style-name="P64"><text:span text:style-name="T4">http://localhost:8080/students-server/rest</text:span></text:p>
          </text:deletion>
        </text:changed-region>
        <text:changed-region xml:id="ct108432212024720" text:id="ct108432212024720">
          <text:deletion>
            <office:change-info>
              <dc:creator>Auteur inconnu</dc:creator>
              <dc:date>2025-01-06T15:38:28</dc:date>
            </office:change-info>
            <text:p text:style-name="Standard"/>
            <text:p text:style-name="Standard"/>
          </text:deletion>
        </text:changed-region>
        <text:changed-region xml:id="ct108432212025696" text:id="ct108432212025696">
          <text:insertion>
            <office:change-info>
              <dc:creator>Auteur inconnu</dc:creator>
              <dc:date>2024-11-24T15:45:14</dc:date>
            </office:change-info>
          </text:insertion>
        </text:changed-region>
        <text:changed-region xml:id="ct108432212025936" text:id="ct108432212025936">
          <text:insertion>
            <office:change-info>
              <dc:creator>Auteur inconnu</dc:creator>
              <dc:date>2024-11-24T18:31:48</dc:date>
            </office:change-info>
          </text:insertion>
        </text:changed-region>
        <text:changed-region xml:id="ct108432212026912" text:id="ct108432212026912">
          <text:insertion>
            <office:change-info>
              <dc:creator>Auteur inconnu</dc:creator>
              <dc:date>2024-11-24T18:32:07</dc:date>
            </office:change-info>
          </text:insertion>
        </text:changed-region>
        <text:changed-region xml:id="ct108432212027152" text:id="ct108432212027152">
          <text:deletion>
            <office:change-info>
              <dc:creator>Auteur inconnu</dc:creator>
              <dc:date>2024-11-24T18:32:06</dc:date>
            </office:change-info>
            <text:p text:style-name="P23">éer</text:p>
          </text:deletion>
        </text:changed-region>
        <text:changed-region xml:id="ct108432212027392" text:id="ct108432212027392">
          <text:insertion>
            <office:change-info>
              <dc:creator>Auteur inconnu</dc:creator>
              <dc:date>2024-11-24T18:32:08</dc:date>
            </office:change-info>
          </text:insertion>
        </text:changed-region>
        <text:changed-region xml:id="ct108432212027632" text:id="ct108432212027632">
          <text:deletion>
            <office:change-info>
              <dc:creator>Auteur inconnu</dc:creator>
              <dc:date>2024-11-24T18:32:31</dc:date>
            </office:change-info>
            <text:p text:style-name="P23"><text:s/>ce projet</text:p>
          </text:deletion>
        </text:changed-region>
        <text:changed-region xml:id="ct108432212027872" text:id="ct108432212027872">
          <text:deletion>
            <office:change-info>
              <dc:creator>Auteur inconnu</dc:creator>
              <dc:date>2024-11-24T15:51:43</dc:date>
            </office:change-info>
            <text:p text:style-name="P23"><text:s/>(un DynamicWebProject)</text:p>
          </text:deletion>
        </text:changed-region>
        <text:changed-region xml:id="ct108432211686816" text:id="ct108432211686816">
          <text:deletion>
            <office:change-info>
              <dc:creator>Auteur inconnu</dc:creator>
              <dc:date>2024-11-24T18:32:31</dc:date>
            </office:change-info>
            <text:p text:style-name="P23"><text:s/>dans </text:p>
          </text:deletion>
        </text:changed-region>
        <text:changed-region xml:id="ct108432211979584" text:id="ct108432211979584">
          <text:deletion>
            <office:change-info>
              <dc:creator>Auteur inconnu</dc:creator>
              <dc:date>2024-11-24T15:51:53</dc:date>
            </office:change-info>
            <text:p text:style-name="P23">eclipse</text:p>
          </text:deletion>
        </text:changed-region>
        <text:changed-region xml:id="ct108432211989904" text:id="ct108432211989904">
          <text:insertion>
            <office:change-info>
              <dc:creator>Auteur inconnu</dc:creator>
              <dc:date>2024-11-24T15:52:05</dc:date>
            </office:change-info>
          </text:insertion>
        </text:changed-region>
        <text:changed-region xml:id="ct108432212030480" text:id="ct108432212030480">
          <text:deletion>
            <office:change-info>
              <dc:creator>Auteur inconnu</dc:creator>
              <dc:date>2024-11-24T15:52:04</dc:date>
            </office:change-info>
            <text:p text:style-name="P23"><text:s/></text:p>
          </text:deletion>
        </text:changed-region>
        <text:changed-region xml:id="ct108432212030720" text:id="ct108432212030720">
          <text:deletion>
            <office:change-info>
              <dc:creator>Auteur inconnu</dc:creator>
              <dc:date>2021-11-25T10:43:03</dc:date>
            </office:change-info>
            <text:p text:style-name="P23">(l</text:p>
          </text:deletion>
        </text:changed-region>
        <text:changed-region xml:id="ct108432212030960" text:id="ct108432212030960">
          <text:deletion>
            <office:change-info>
              <dc:creator>Auteur inconnu</dc:creator>
              <dc:date>2024-11-24T15:52:04</dc:date>
            </office:change-info>
            <text:p text:style-name="P23">es sources java + le web.xml dans </text:p>
          </text:deletion>
        </text:changed-region>
        <text:changed-region xml:id="ct108432212031200" text:id="ct108432212031200">
          <text:deletion>
            <office:change-info>
              <dc:creator>Auteur inconnu</dc:creator>
              <dc:date>2022-11-29T10:28:16</dc:date>
            </office:change-info>
            <text:p text:style-name="P23">WebContent/</text:p>
          </text:deletion>
        </text:changed-region>
        <text:changed-region xml:id="ct108432212031440" text:id="ct108432212031440">
          <text:deletion>
            <office:change-info>
              <dc:creator>Auteur inconnu</dc:creator>
              <dc:date>2024-11-24T15:52:04</dc:date>
            </office:change-info>
            <text:p text:style-name="P23">WEB-INF</text:p>
          </text:deletion>
        </text:changed-region>
        <text:changed-region xml:id="ct108432212031680" text:id="ct108432212031680">
          <text:deletion>
            <office:change-info>
              <dc:creator>Auteur inconnu</dc:creator>
              <dc:date>2021-11-25T10:43:07</dc:date>
            </office:change-info>
            <text:p text:style-name="P23">)</text:p>
          </text:deletion>
        </text:changed-region>
        <text:changed-region xml:id="ct108432212031920" text:id="ct108432212031920">
          <text:insertion>
            <office:change-info>
              <dc:creator>Auteur inconnu</dc:creator>
              <dc:date>2024-11-24T15:53:08</dc:date>
            </office:change-info>
          </text:insertion>
        </text:changed-region>
        <text:changed-region xml:id="ct108432212032160" text:id="ct108432212032160">
          <text:insertion>
            <office:change-info>
              <dc:creator>Auteur inconnu</dc:creator>
              <dc:date>2024-11-24T18:33:16</dc:date>
            </office:change-info>
          </text:insertion>
        </text:changed-region>
        <text:changed-region xml:id="ct108432212035344" text:id="ct108432212035344">
          <text:insertion>
            <office:change-info>
              <dc:creator>Auteur inconnu</dc:creator>
              <dc:date>2024-11-24T15:52:22</dc:date>
            </office:change-info>
          </text:insertion>
        </text:changed-region>
        <text:changed-region xml:id="ct108432212037104" text:id="ct108432212037104">
          <text:insertion>
            <office:change-info>
              <dc:creator>Auteur inconnu</dc:creator>
              <dc:date>2024-11-24T15:53:44</dc:date>
            </office:change-info>
          </text:insertion>
        </text:changed-region>
        <text:changed-region xml:id="ct108432212038544" text:id="ct108432212038544">
          <text:insertion>
            <office:change-info>
              <dc:creator>Auteur inconnu</dc:creator>
              <dc:date>2024-11-24T15:54:18</dc:date>
            </office:change-info>
          </text:insertion>
        </text:changed-region>
        <text:changed-region xml:id="ct108432212005184" text:id="ct108432212005184">
          <text:insertion>
            <office:change-info>
              <dc:creator>Auteur inconnu</dc:creator>
              <dc:date>2024-11-24T15:55:00</dc:date>
            </office:change-info>
          </text:insertion>
        </text:changed-region>
        <text:changed-region xml:id="ct108432212006864" text:id="ct108432212006864">
          <text:insertion>
            <office:change-info>
              <dc:creator>Auteur inconnu</dc:creator>
              <dc:date>2024-11-24T15:56:19</dc:date>
            </office:change-info>
          </text:insertion>
        </text:changed-region>
        <text:changed-region xml:id="ct108432212060576" text:id="ct108432212060576">
          <text:insertion>
            <office:change-info>
              <dc:creator>Auteur inconnu</dc:creator>
              <dc:date>2024-11-24T18:13:45</dc:date>
            </office:change-info>
          </text:insertion>
        </text:changed-region>
        <text:changed-region xml:id="ct108432212063456" text:id="ct108432212063456">
          <text:insertion>
            <office:change-info>
              <dc:creator>Auteur inconnu</dc:creator>
              <dc:date>2024-11-24T18:35:57</dc:date>
            </office:change-info>
          </text:insertion>
        </text:changed-region>
        <text:changed-region xml:id="ct108432212065040" text:id="ct108432212065040">
          <text:insertion>
            <office:change-info>
              <dc:creator>Auteur inconnu</dc:creator>
              <dc:date>2024-11-24T18:36:00</dc:date>
            </office:change-info>
          </text:insertion>
        </text:changed-region>
        <text:changed-region xml:id="ct108432212075920" text:id="ct108432212075920">
          <text:insertion>
            <office:change-info>
              <dc:creator>Auteur inconnu</dc:creator>
              <dc:date>2024-11-24T15:58:05</dc:date>
            </office:change-info>
          </text:insertion>
        </text:changed-region>
        <text:changed-region xml:id="ct108432212076160" text:id="ct108432212076160">
          <text:insertion>
            <office:change-info>
              <dc:creator>Auteur inconnu</dc:creator>
              <dc:date>2024-11-24T18:38:37</dc:date>
            </office:change-info>
          </text:insertion>
        </text:changed-region>
        <text:changed-region xml:id="ct108432212083536" text:id="ct108432212083536">
          <text:insertion>
            <office:change-info>
              <dc:creator>Auteur inconnu</dc:creator>
              <dc:date>2024-11-24T16:00:00</dc:date>
            </office:change-info>
          </text:insertion>
        </text:changed-region>
        <text:changed-region xml:id="ct108432212084080" text:id="ct108432212084080">
          <text:deletion>
            <office:change-info>
              <dc:creator>Auteur inconnu</dc:creator>
              <dc:date>2024-11-24T16:00:39</dc:date>
            </office:change-info>
            <text:p text:style-name="P36"><text:span text:style-name="T6">Installez ce WS </text:span><text:span text:style-name="T21">REST </text:span><text:span text:style-name="T6">dans votre Tomcat </text:span><text:span text:style-name="T16">(export WAR)</text:span></text:p>
            <text:p text:style-name="P45"><text:span text:style-name="T17">T</text:span>estez le <text:span text:style-name="T18">WS</text:span> <text:span text:style-name="T10">directement avec un navigateur (URLs ci-dessus).</text:span></text:p>
          </text:deletion>
        </text:changed-region>
        <text:changed-region xml:id="ct108432212084448" text:id="ct108432212084448">
          <text:deletion>
            <office:change-info>
              <dc:creator>Auteur inconnu</dc:creator>
              <dc:date>2024-11-24T18:40:57</dc:date>
            </office:change-info>
            <text:p text:style-name="P45"><text:span text:style-name="T27"/></text:p>
            <text:p text:style-name="P45">Implantez dans un projet Java un programme client qui fait appel </text:p>
          </text:deletion>
        </text:changed-region>
        <text:changed-region xml:id="ct108432212085392" text:id="ct108432212085392">
          <text:deletion>
            <office:change-info>
              <dc:creator>Auteur inconnu</dc:creator>
              <dc:date>2024-11-24T16:00:51</dc:date>
            </office:change-info>
            <text:p text:style-name="P45">à ce </text:p>
          </text:deletion>
        </text:changed-region>
        <text:changed-region xml:id="ct108432212085664" text:id="ct108432212085664">
          <text:deletion>
            <office:change-info>
              <dc:creator>Auteur inconnu</dc:creator>
              <dc:date>2024-11-24T18:40:54</dc:date>
            </office:change-info>
            <text:p text:style-name="P45">service (en utilisant resteasy</text:p>
          </text:deletion>
        </text:changed-region>
        <text:changed-region xml:id="ct108432212086080" text:id="ct108432212086080">
          <text:insertion>
            <office:change-info>
              <dc:creator>Auteur inconnu</dc:creator>
              <dc:date>2024-11-24T16:01:25</dc:date>
            </office:change-info>
          </text:insertion>
        </text:changed-region>
        <text:changed-region xml:id="ct108432212087072" text:id="ct108432212087072">
          <text:insertion>
            <office:change-info>
              <dc:creator>Auteur inconnu</dc:creator>
              <dc:date>2024-11-24T18:40:06</dc:date>
            </office:change-info>
          </text:insertion>
        </text:changed-region>
        <text:changed-region xml:id="ct108432212087856" text:id="ct108432212087856">
          <text:insertion>
            <office:change-info>
              <dc:creator>Auteur inconnu</dc:creator>
              <dc:date>2024-11-24T16:01:25</dc:date>
            </office:change-info>
          </text:insertion>
        </text:changed-region>
        <text:changed-region xml:id="ct108432212090688" text:id="ct108432212090688">
          <text:insertion>
            <office:change-info>
              <dc:creator>Auteur inconnu</dc:creator>
              <dc:date>2024-11-24T18:41:17</dc:date>
            </office:change-info>
          </text:insertion>
        </text:changed-region>
        <text:changed-region xml:id="ct108432212090928" text:id="ct108432212090928">
          <text:insertion>
            <office:change-info>
              <dc:creator>Auteur inconnu</dc:creator>
              <dc:date>2024-11-24T18:16:00</dc:date>
            </office:change-info>
          </text:insertion>
        </text:changed-region>
        <text:changed-region xml:id="ct108432212092864" text:id="ct108432212092864">
          <text:insertion>
            <office:change-info>
              <dc:creator>Auteur inconnu</dc:creator>
              <dc:date>2021-11-25T10:53:35</dc:date>
            </office:change-info>
          </text:insertion>
        </text:changed-region>
        <text:changed-region xml:id="ct108432212102816" text:id="ct108432212102816">
          <text:deletion>
            <office:change-info>
              <dc:creator>Auteur inconnu</dc:creator>
              <dc:date>2024-11-24T16:05:46</dc:date>
            </office:change-info>
            <text:p text:style-name="P6">). <text:span text:style-name="T10">Un exemple est donné dans les transparents du cours. Il vous suffit de :</text:span></text:p>
            <text:p text:style-name="P6"/>
          </text:deletion>
        </text:changed-region>
        <text:changed-region xml:id="ct108432212103248" text:id="ct108432212103248">
          <text:insertion>
            <office:change-info>
              <dc:creator>Auteur inconnu</dc:creator>
              <dc:date>2024-11-24T16:05:47</dc:date>
            </office:change-info>
          </text:insertion>
        </text:changed-region>
        <text:changed-region xml:id="ct108432212103488" text:id="ct108432212103488">
          <text:deletion>
            <office:change-info>
              <dc:creator>Auteur inconnu</dc:creator>
              <dc:date>2024-11-24T18:43:05</dc:date>
            </office:change-info>
            <text:p text:style-name="P6"><text:span text:style-name="T11">décrire</text:span></text:p>
          </text:deletion>
        </text:changed-region>
        <text:changed-region xml:id="ct108432212103728" text:id="ct108432212103728">
          <text:insertion>
            <office:change-info>
              <dc:creator>Auteur inconnu</dc:creator>
              <dc:date>2024-11-24T18:43:05</dc:date>
            </office:change-info>
          </text:insertion>
        </text:changed-region>
        <text:changed-region xml:id="ct108432212103968" text:id="ct108432212103968">
          <text:insertion>
            <office:change-info>
              <dc:creator>Auteur inconnu</dc:creator>
              <dc:date>2024-11-24T18:43:09</dc:date>
            </office:change-info>
          </text:insertion>
        </text:changed-region>
        <text:changed-region xml:id="ct108432212104208" text:id="ct108432212104208">
          <text:deletion>
            <office:change-info>
              <dc:creator>Auteur inconnu</dc:creator>
              <dc:date>2024-11-24T18:43:09</dc:date>
            </office:change-info>
            <text:p text:style-name="P6"><text:span text:style-name="T11">l’</text:span></text:p>
          </text:deletion>
        </text:changed-region>
        <text:changed-region xml:id="ct108432212104448" text:id="ct108432212104448">
          <text:insertion>
            <office:change-info>
              <dc:creator>Auteur inconnu</dc:creator>
              <dc:date>2024-11-24T18:43:10</dc:date>
            </office:change-info>
          </text:insertion>
        </text:changed-region>
        <text:changed-region xml:id="ct108432212104688" text:id="ct108432212104688">
          <text:deletion>
            <office:change-info>
              <dc:creator>Auteur inconnu</dc:creator>
              <dc:date>2024-11-24T18:43:23</dc:date>
            </office:change-info>
            <text:p text:style-name="P6"><text:span text:style-name="T11">du service avec les</text:span></text:p>
          </text:deletion>
        </text:changed-region>
        <text:changed-region xml:id="ct108432212104928" text:id="ct108432212104928">
          <text:insertion>
            <office:change-info>
              <dc:creator>Auteur inconnu</dc:creator>
              <dc:date>2024-11-24T18:43:23</dc:date>
            </office:change-info>
          </text:insertion>
        </text:changed-region>
        <text:changed-region xml:id="ct108432212105168" text:id="ct108432212105168">
          <text:deletion>
            <office:change-info>
              <dc:creator>Auteur inconnu</dc:creator>
              <dc:date>2024-11-24T16:05:55</dc:date>
            </office:change-info>
            <text:p text:style-name="P6"><text:span text:style-name="T11"><text:s/>(attention, dans l’URL du service, ne pas inclure "rest" à la fin)</text:span></text:p>
          </text:deletion>
        </text:changed-region>
        <text:changed-region xml:id="ct108432212105408" text:id="ct108432212105408">
          <text:deletion>
            <office:change-info>
              <dc:creator>Auteur inconnu</dc:creator>
              <dc:date>2024-11-24T16:06:06</dc:date>
            </office:change-info>
            <text:p text:style-name="P26"><text:span text:style-name="T6">- </text:span></text:p>
          </text:deletion>
        </text:changed-region>
        <text:changed-region xml:id="ct108432212106048" text:id="ct108432212106048">
          <text:deletion>
            <office:change-info>
              <dc:creator>Auteur inconnu</dc:creator>
              <dc:date>2021-11-25T10:55:12</dc:date>
            </office:change-info>
            <text:p text:style-name="P26"><text:span text:style-name="T19">copier</text:span></text:p>
          </text:deletion>
        </text:changed-region>
        <text:changed-region xml:id="ct108432212106288" text:id="ct108432212106288">
          <text:deletion>
            <office:change-info>
              <dc:creator>Auteur inconnu</dc:creator>
              <dc:date>2024-11-24T16:06:32</dc:date>
            </office:change-info>
            <text:p text:style-name="P26"><text:span text:style-name="T19"><text:s/>les Java beans associés aux Json utilisés</text:span></text:p>
            <text:p text:style-name="P26"/>
          </text:deletion>
        </text:changed-region>
        <text:changed-region xml:id="ct108432212106736" text:id="ct108432212106736">
          <text:insertion>
            <office:change-info>
              <dc:creator>Auteur inconnu</dc:creator>
              <dc:date>2024-11-24T16:07:02</dc:date>
            </office:change-info>
          </text:insertion>
        </text:changed-region>
        <text:changed-region xml:id="ct108432212107168" text:id="ct108432212107168">
          <text:deletion>
            <office:change-info>
              <dc:creator>Auteur inconnu</dc:creator>
              <dc:date>2024-11-24T18:43:29</dc:date>
            </office:change-info>
            <text:p text:style-name="P26"><text:span text:style-name="T12">créer</text:span></text:p>
          </text:deletion>
        </text:changed-region>
        <text:changed-region xml:id="ct108432212107408" text:id="ct108432212107408">
          <text:insertion>
            <office:change-info>
              <dc:creator>Auteur inconnu</dc:creator>
              <dc:date>2024-11-24T18:43:29</dc:date>
            </office:change-info>
          </text:insertion>
        </text:changed-region>
        <text:changed-region xml:id="ct108432212107648" text:id="ct108432212107648">
          <text:deletion>
            <office:change-info>
              <dc:creator>Auteur inconnu</dc:creator>
              <dc:date>2024-11-24T18:43:42</dc:date>
            </office:change-info>
            <text:p text:style-name="P26"><text:span text:style-name="T12"><text:s/>et utiliser le proxy Resteasy</text:span></text:p>
          </text:deletion>
        </text:changed-region>
        <text:changed-region xml:id="ct108432212107888" text:id="ct108432212107888">
          <text:insertion>
            <office:change-info>
              <dc:creator>Auteur inconnu</dc:creator>
              <dc:date>2024-11-24T16:06:45</dc:date>
            </office:change-info>
          </text:insertion>
        </text:changed-region>
        <text:changed-region xml:id="ct108432212109008" text:id="ct108432212109008">
          <text:insertion>
            <office:change-info>
              <dc:creator>Auteur inconnu</dc:creator>
              <dc:date>2024-11-24T18:44:00</dc:date>
            </office:change-info>
          </text:insertion>
        </text:changed-region>
        <text:changed-region xml:id="ct108432212109648" text:id="ct108432212109648">
          <text:insertion>
            <office:change-info>
              <dc:creator>Auteur inconnu</dc:creator>
              <dc:date>2024-11-24T19:00:03</dc:date>
            </office:change-info>
          </text:insertion>
        </text:changed-region>
        <text:changed-region xml:id="ct108432212110432" text:id="ct108432212110432">
          <text:insertion>
            <office:change-info>
              <dc:creator>Auteur inconnu</dc:creator>
              <dc:date>2024-11-24T19:01:04</dc:date>
            </office:change-info>
          </text:insertion>
        </text:changed-region>
        <text:changed-region xml:id="ct108432212110880" text:id="ct108432212110880">
          <text:insertion>
            <office:change-info>
              <dc:creator>Auteur inconnu</dc:creator>
              <dc:date>2025-01-06T16:01:01</dc:date>
            </office:change-info>
          </text:insertion>
        </text:changed-region>
        <text:changed-region xml:id="ct108432212094880" text:id="ct108432212094880">
          <text:insertion>
            <office:change-info>
              <dc:creator>Auteur inconnu</dc:creator>
              <dc:date>2024-11-24T16:07:15</dc:date>
            </office:change-info>
          </text:insertion>
        </text:changed-region>
        <text:changed-region xml:id="ct108432212081136" text:id="ct108432212081136">
          <text:deletion>
            <office:change-info>
              <dc:creator>Auteur inconnu</dc:creator>
              <dc:date>2024-11-24T16:07:14</dc:date>
            </office:change-info>
            <text:p text:style-name="P5"><text:span text:style-name="T10">2</text:span></text:p>
          </text:deletion>
        </text:changed-region>
        <text:changed-region xml:id="ct108432212082032" text:id="ct108432212082032">
          <text:deletion>
            <office:change-info>
              <dc:creator>Auteur inconnu</dc:creator>
              <dc:date>2024-11-24T16:07:41</dc:date>
            </office:change-info>
            <text:p text:style-name="P5">Création</text:p>
          </text:deletion>
        </text:changed-region>
        <text:changed-region xml:id="ct108432212093360" text:id="ct108432212093360">
          <text:insertion>
            <office:change-info>
              <dc:creator>Auteur inconnu</dc:creator>
              <dc:date>2024-11-24T16:07:42</dc:date>
            </office:change-info>
          </text:insertion>
        </text:changed-region>
        <text:changed-region xml:id="ct108432212111616" text:id="ct108432212111616">
          <text:insertion>
            <office:change-info>
              <dc:creator>Auteur inconnu</dc:creator>
              <dc:date>2024-11-24T18:44:33</dc:date>
            </office:change-info>
          </text:insertion>
        </text:changed-region>
        <text:changed-region xml:id="ct108432212111936" text:id="ct108432212111936">
          <text:deletion>
            <office:change-info>
              <dc:creator>Auteur inconnu</dc:creator>
              <dc:date>2024-11-24T16:07:53</dc:date>
            </office:change-info>
            <text:p text:style-name="P5">d’un </text:p>
          </text:deletion>
        </text:changed-region>
        <text:changed-region xml:id="ct108432212112256" text:id="ct108432212112256">
          <text:deletion>
            <office:change-info>
              <dc:creator>Auteur inconnu</dc:creator>
              <dc:date>2024-11-24T16:07:54</dc:date>
            </office:change-info>
            <text:p text:style-name="P5"><text:s/>REST</text:p>
          </text:deletion>
        </text:changed-region>
        <text:changed-region xml:id="ct108432212112496" text:id="ct108432212112496">
          <text:deletion>
            <office:change-info>
              <dc:creator>Auteur inconnu</dc:creator>
              <dc:date>2024-11-24T16:08:06</dc:date>
            </office:change-info>
            <text:p text:style-name="P5"><text:s/>+ Json</text:p>
          </text:deletion>
        </text:changed-region>
        <text:changed-region xml:id="ct108432212113568" text:id="ct108432212113568">
          <text:deletion>
            <office:change-info>
              <dc:creator>Auteur inconnu</dc:creator>
              <dc:date>2024-11-24T18:44:41</dc:date>
            </office:change-info>
            <text:p text:style-name="P10">C<text:span text:style-name="T10">r</text:span>éez</text:p>
          </text:deletion>
        </text:changed-region>
        <text:changed-region xml:id="ct108432212113808" text:id="ct108432212113808">
          <text:insertion>
            <office:change-info>
              <dc:creator>Auteur inconnu</dc:creator>
              <dc:date>2024-11-24T18:44:41</dc:date>
            </office:change-info>
          </text:insertion>
        </text:changed-region>
        <text:changed-region xml:id="ct108432211753296" text:id="ct108432211753296">
          <text:deletion>
            <office:change-info>
              <dc:creator>Auteur inconnu</dc:creator>
              <dc:date>2024-11-24T18:44:45</dc:date>
            </office:change-info>
            <text:p text:style-name="P10">un</text:p>
          </text:deletion>
        </text:changed-region>
        <text:changed-region xml:id="ct108432212082272" text:id="ct108432212082272">
          <text:insertion>
            <office:change-info>
              <dc:creator>Auteur inconnu</dc:creator>
              <dc:date>2024-11-24T18:44:45</dc:date>
            </office:change-info>
          </text:insertion>
        </text:changed-region>
        <text:changed-region xml:id="ct108432212096128" text:id="ct108432212096128">
          <text:insertion>
            <office:change-info>
              <dc:creator>Auteur inconnu</dc:creator>
              <dc:date>2024-11-24T18:45:13</dc:date>
            </office:change-info>
          </text:insertion>
        </text:changed-region>
        <text:changed-region xml:id="ct108432212093872" text:id="ct108432212093872">
          <text:insertion>
            <office:change-info>
              <dc:creator>Auteur inconnu</dc:creator>
              <dc:date>2024-11-24T18:45:14</dc:date>
            </office:change-info>
          </text:insertion>
        </text:changed-region>
        <text:changed-region xml:id="ct108432212081728" text:id="ct108432212081728">
          <text:deletion>
            <office:change-info>
              <dc:creator>Auteur inconnu</dc:creator>
              <dc:date>2024-11-24T18:45:16</dc:date>
            </office:change-info>
            <text:p text:style-name="P10"><text:s/></text:p>
          </text:deletion>
        </text:changed-region>
        <text:changed-region xml:id="ct108432212094416" text:id="ct108432212094416">
          <text:deletion>
            <office:change-info>
              <dc:creator>Auteur inconnu</dc:creator>
              <dc:date>2024-11-24T18:45:15</dc:date>
            </office:change-info>
            <text:p text:style-name="P10">REST</text:p>
          </text:deletion>
        </text:changed-region>
        <text:changed-region xml:id="ct108432212077984" text:id="ct108432212077984">
          <text:deletion>
            <office:change-info>
              <dc:creator>Auteur inconnu</dc:creator>
              <dc:date>2024-11-24T18:45:20</dc:date>
            </office:change-info>
            <text:p text:style-name="P10"><text:s/>+ Json</text:p>
          </text:deletion>
        </text:changed-region>
        <text:changed-region xml:id="ct108432212116256" text:id="ct108432212116256">
          <text:insertion>
            <office:change-info>
              <dc:creator>Auteur inconnu</dc:creator>
              <dc:date>2021-11-25T11:11:12</dc:date>
            </office:change-info>
          </text:insertion>
        </text:changed-region>
        <text:changed-region xml:id="ct108432212116608" text:id="ct108432212116608">
          <text:deletion>
            <office:change-info>
              <dc:creator>Auteur inconnu</dc:creator>
              <dc:date>2024-11-24T18:45:33</dc:date>
            </office:change-info>
            <text:p text:style-name="P10">qui</text:p>
          </text:deletion>
        </text:changed-region>
        <text:changed-region xml:id="ct108432212117888" text:id="ct108432212117888">
          <text:insertion>
            <office:change-info>
              <dc:creator>Auteur inconnu</dc:creator>
              <dc:date>2024-11-24T18:45:33</dc:date>
            </office:change-info>
          </text:insertion>
        </text:changed-region>
        <text:changed-region xml:id="ct108432212119408" text:id="ct108432212119408">
          <text:insertion>
            <office:change-info>
              <dc:creator>Auteur inconnu</dc:creator>
              <dc:date>2024-11-24T18:46:00</dc:date>
            </office:change-info>
          </text:insertion>
        </text:changed-region>
        <text:changed-region xml:id="ct108432212120928" text:id="ct108432212120928">
          <text:insertion>
            <office:change-info>
              <dc:creator>Auteur inconnu</dc:creator>
              <dc:date>2024-11-24T18:47:01</dc:date>
            </office:change-info>
          </text:insertion>
        </text:changed-region>
        <text:changed-region xml:id="ct108432212121200" text:id="ct108432212121200">
          <text:deletion>
            <office:change-info>
              <dc:creator>Auteur inconnu</dc:creator>
              <dc:date>2024-11-24T18:49:31</dc:date>
            </office:change-info>
            <text:p text:style-name="P10"><text:s/>permet de récupérer à partir du nom-prénom d’un étudiant et d’une matière, la note que cet étudiant a obtenu dans la matière. </text:p>
          </text:deletion>
        </text:changed-region>
        <text:changed-region xml:id="ct108432212121936" text:id="ct108432212121936">
          <text:deletion>
            <office:change-info>
              <dc:creator>Auteur inconnu</dc:creator>
              <dc:date>2021-11-25T11:00:19</dc:date>
            </office:change-info>
            <text:p text:style-name="P10">Ce W<text:span text:style-name="T22">S</text:span> doit donc fournir</text:p>
          </text:deletion>
        </text:changed-region>
        <text:changed-region xml:id="ct108432212122416" text:id="ct108432212122416">
          <text:deletion>
            <office:change-info>
              <dc:creator>Auteur inconnu</dc:creator>
              <dc:date>2024-11-24T18:49:31</dc:date>
            </office:change-info>
            <text:p text:style-name="P10"><text:s/>une interface :</text:p>
          </text:deletion>
        </text:changed-region>
        <text:changed-region xml:id="ct108432212124000" text:id="ct108432212124000">
          <text:deletion>
            <office:change-info>
              <dc:creator>Auteur inconnu</dc:creator>
              <dc:date>2024-11-24T18:49:34</dc:date>
            </office:change-info>
            <text:p text:style-name="P2">ét</text:p>
          </text:deletion>
        </text:changed-region>
        <text:changed-region xml:id="ct108432212124240" text:id="ct108432212124240">
          <text:insertion>
            <office:change-info>
              <dc:creator>Auteur inconnu</dc:creator>
              <dc:date>2024-11-24T18:49:35</dc:date>
            </office:change-info>
          </text:insertion>
        </text:changed-region>
        <text:changed-region xml:id="ct108432212124480" text:id="ct108432212124480">
          <text:deletion>
            <office:change-info>
              <dc:creator>Auteur inconnu</dc:creator>
              <dc:date>2024-11-24T18:49:38</dc:date>
            </office:change-info>
            <text:p text:style-name="P2">e</text:p>
          </text:deletion>
        </text:changed-region>
        <text:changed-region xml:id="ct108432212124720" text:id="ct108432212124720">
          <text:insertion>
            <office:change-info>
              <dc:creator>Auteur inconnu</dc:creator>
              <dc:date>2024-11-24T18:49:44</dc:date>
            </office:change-info>
          </text:insertion>
        </text:changed-region>
        <text:changed-region xml:id="ct108432212124960" text:id="ct108432212124960">
          <text:deletion>
            <office:change-info>
              <dc:creator>Auteur inconnu</dc:creator>
              <dc:date>2024-11-24T18:49:44</dc:date>
            </office:change-info>
            <text:p text:style-name="P2">ètre<text:span text:style-name="T15">s</text:span></text:p>
          </text:deletion>
        </text:changed-region>
        <text:changed-region xml:id="ct108432212125200" text:id="ct108432212125200">
          <text:insertion>
            <office:change-info>
              <dc:creator>Auteur inconnu</dc:creator>
              <dc:date>2024-11-24T18:50:01</dc:date>
            </office:change-info>
          </text:insertion>
        </text:changed-region>
        <text:changed-region xml:id="ct108432212125440" text:id="ct108432212125440">
          <text:deletion>
            <office:change-info>
              <dc:creator>Auteur inconnu</dc:creator>
              <dc:date>2024-11-24T18:50:01</dc:date>
            </office:change-info>
            <text:p text:style-name="P2"><text:span text:style-name="T8">et</text:span></text:p>
          </text:deletion>
        </text:changed-region>
        <text:changed-region xml:id="ct108432212125824" text:id="ct108432212125824">
          <text:deletion>
            <office:change-info>
              <dc:creator>Auteur inconnu</dc:creator>
              <dc:date>2024-11-24T18:50:05</dc:date>
            </office:change-info>
            <text:p text:style-name="P2">retourne</text:p>
          </text:deletion>
        </text:changed-region>
        <text:changed-region xml:id="ct108432212126064" text:id="ct108432212126064">
          <text:insertion>
            <office:change-info>
              <dc:creator>Auteur inconnu</dc:creator>
              <dc:date>2024-11-24T18:50:05</dc:date>
            </office:change-info>
          </text:insertion>
        </text:changed-region>
        <text:changed-region xml:id="ct108432212126304" text:id="ct108432212126304">
          <text:deletion>
            <office:change-info>
              <dc:creator>Auteur inconnu</dc:creator>
              <dc:date>2024-11-24T18:50:09</dc:date>
            </office:change-info>
            <text:p text:style-name="P2">un</text:p>
          </text:deletion>
        </text:changed-region>
        <text:changed-region xml:id="ct108432212126544" text:id="ct108432212126544">
          <text:insertion>
            <office:change-info>
              <dc:creator>Auteur inconnu</dc:creator>
              <dc:date>2024-11-24T18:50:09</dc:date>
            </office:change-info>
          </text:insertion>
        </text:changed-region>
        <text:changed-region xml:id="ct108432212127808" text:id="ct108432212127808">
          <text:insertion>
            <office:change-info>
              <dc:creator>Auteur inconnu</dc:creator>
              <dc:date>2024-11-24T18:50:14</dc:date>
            </office:change-info>
          </text:insertion>
        </text:changed-region>
        <text:changed-region xml:id="ct108432212128048" text:id="ct108432212128048">
          <text:deletion>
            <office:change-info>
              <dc:creator>Auteur inconnu</dc:creator>
              <dc:date>2024-11-24T18:50:13</dc:date>
            </office:change-info>
            <text:p text:style-name="P6">E</text:p>
          </text:deletion>
        </text:changed-region>
        <text:changed-region xml:id="ct108432212128288" text:id="ct108432212128288">
          <text:insertion>
            <office:change-info>
              <dc:creator>Auteur inconnu</dc:creator>
              <dc:date>2024-11-24T18:50:17</dc:date>
            </office:change-info>
          </text:insertion>
        </text:changed-region>
        <text:changed-region xml:id="ct108432212128528" text:id="ct108432212128528">
          <text:insertion>
            <office:change-info>
              <dc:creator>Auteur inconnu</dc:creator>
              <dc:date>2024-11-24T18:50:20</dc:date>
            </office:change-info>
          </text:insertion>
        </text:changed-region>
        <text:changed-region xml:id="ct108432212128768" text:id="ct108432212128768">
          <text:deletion>
            <office:change-info>
              <dc:creator>Auteur inconnu</dc:creator>
              <dc:date>2024-11-24T18:50:20</dc:date>
            </office:change-info>
            <text:p text:style-name="P6">e</text:p>
          </text:deletion>
        </text:changed-region>
        <text:changed-region xml:id="ct108432212129008" text:id="ct108432212129008">
          <text:deletion>
            <office:change-info>
              <dc:creator>Auteur inconnu</dc:creator>
              <dc:date>2024-11-24T18:50:25</dc:date>
            </office:change-info>
            <text:p text:style-name="P6"><text:s/>d’appel </text:p>
          </text:deletion>
        </text:changed-region>
        <text:changed-region xml:id="ct108432262004112" text:id="ct108432262004112">
          <text:format-change>
            <office:change-info>
              <dc:creator>Auteur inconnu</dc:creator>
              <dc:date>2025-11-22T14:19:59</dc:date>
            </office:change-info>
          </text:format-change>
        </text:changed-region>
        <text:changed-region xml:id="ct108432212129984" text:id="ct108432212129984">
          <text:deletion>
            <office:change-info>
              <dc:creator>Auteur inconnu</dc:creator>
              <dc:date>2021-11-25T10:58:50</dc:date>
            </office:change-info>
            <text:p text:style-name="P29"><text:a xlink:type="simple" xlink:href="http://localhost:8080/students-rest/rest/getmark?firstname=Alain&amp;lastname=Tchana&amp;lecture=systems" text:style-name="Internet_20_link" text:visited-style-name="Visited_20_Internet_20_Link"><text:span text:style-name="T53">student-rest</text:span></text:a></text:p>
          </text:deletion>
        </text:changed-region>
        <text:changed-region xml:id="ct108432212130224" text:id="ct108432212130224">
          <text:insertion>
            <office:change-info>
              <dc:creator>Auteur inconnu</dc:creator>
              <dc:date>2024-11-24T18:19:25</dc:date>
            </office:change-info>
          </text:insertion>
        </text:changed-region>
        <text:changed-region xml:id="ct108432212130464" text:id="ct108432212130464">
          <text:insertion>
            <office:change-info>
              <dc:creator>Auteur inconnu</dc:creator>
              <dc:date>2021-11-25T10:58:50</dc:date>
            </office:change-info>
          </text:insertion>
        </text:changed-region>
        <text:changed-region xml:id="ct108432160259344" text:id="ct108432160259344">
          <text:format-change>
            <office:change-info>
              <dc:creator>Auteur inconnu</dc:creator>
              <dc:date>2025-11-22T14:19:59</dc:date>
            </office:change-info>
          </text:format-change>
        </text:changed-region>
        <text:changed-region xml:id="ct108432212130704" text:id="ct108432212130704">
          <text:deletion>
            <office:change-info>
              <dc:creator>Auteur inconnu</dc:creator>
              <dc:date>2024-11-24T16:08:57</dc:date>
            </office:change-info>
            <text:p text:style-name="P29"><text:a xlink:type="simple" xlink:href="http://localhost:8080/students-rest/rest/getmark?firstname=Alain&amp;lastname=Tchana&amp;lecture=systems" text:style-name="Internet_20_link" text:visited-style-name="Visited_20_Internet_20_Link"><text:span text:style-name="T53">rest/</text:span></text:a></text:p>
          </text:deletion>
        </text:changed-region>
        <text:changed-region xml:id="ct108432161543952" text:id="ct108432161543952">
          <text:format-change>
            <office:change-info>
              <dc:creator>Auteur inconnu</dc:creator>
              <dc:date>2025-11-22T14:19:59</dc:date>
            </office:change-info>
          </text:format-change>
        </text:changed-region>
        <text:changed-region xml:id="ct108432212131680" text:id="ct108432212131680">
          <text:deletion>
            <office:change-info>
              <dc:creator>Auteur inconnu</dc:creator>
              <dc:date>2025-01-06T17:50:21</dc:date>
            </office:change-info>
            <text:p text:style-name="P41"/>
            <text:p text:style-name="P67"/>
          </text:deletion>
        </text:changed-region>
        <text:changed-region xml:id="ct108432212131920" text:id="ct108432212131920">
          <text:deletion>
            <office:change-info>
              <dc:creator>Auteur inconnu</dc:creator>
              <dc:date>2024-11-24T18:50:30</dc:date>
            </office:change-info>
            <text:p text:style-name="P67">Pou</text:p>
          </text:deletion>
        </text:changed-region>
        <text:changed-region xml:id="ct108432212132896" text:id="ct108432212132896">
          <text:insertion>
            <office:change-info>
              <dc:creator>Auteur inconnu</dc:creator>
              <dc:date>2024-11-24T18:52:52</dc:date>
            </office:change-info>
          </text:insertion>
        </text:changed-region>
        <text:changed-region xml:id="ct108432212133136" text:id="ct108432212133136">
          <text:deletion>
            <office:change-info>
              <dc:creator>Auteur inconnu</dc:creator>
              <dc:date>2024-11-24T18:50:30</dc:date>
            </office:change-info>
            <text:p text:style-name="P27">r</text:p>
          </text:deletion>
        </text:changed-region>
        <text:changed-region xml:id="ct108432212133376" text:id="ct108432212133376">
          <text:insertion>
            <office:change-info>
              <dc:creator>Auteur inconnu</dc:creator>
              <dc:date>2024-11-24T18:50:30</dc:date>
            </office:change-info>
          </text:insertion>
        </text:changed-region>
        <text:changed-region xml:id="ct108432212133616" text:id="ct108432212133616">
          <text:insertion>
            <office:change-info>
              <dc:creator>Auteur inconnu</dc:creator>
              <dc:date>2024-11-24T18:50:34</dc:date>
            </office:change-info>
          </text:insertion>
        </text:changed-region>
        <text:changed-region xml:id="ct108432212133856" text:id="ct108432212133856">
          <text:deletion>
            <office:change-info>
              <dc:creator>Auteur inconnu</dc:creator>
              <dc:date>2024-11-24T18:50:33</dc:date>
            </office:change-info>
            <text:p text:style-name="P27">anter</text:p>
          </text:deletion>
        </text:changed-region>
        <text:changed-region xml:id="ct108432212134096" text:id="ct108432212134096">
          <text:deletion>
            <office:change-info>
              <dc:creator>Auteur inconnu</dc:creator>
              <dc:date>2024-11-24T18:50:37</dc:date>
            </office:change-info>
            <text:p text:style-name="P27">ce</text:p>
          </text:deletion>
        </text:changed-region>
        <text:changed-region xml:id="ct108432212134336" text:id="ct108432212134336">
          <text:insertion>
            <office:change-info>
              <dc:creator>Auteur inconnu</dc:creator>
              <dc:date>2024-11-24T18:50:37</dc:date>
            </office:change-info>
          </text:insertion>
        </text:changed-region>
        <text:changed-region xml:id="ct108432212134576" text:id="ct108432212134576">
          <text:deletion>
            <office:change-info>
              <dc:creator>Auteur inconnu</dc:creator>
              <dc:date>2024-11-24T18:52:34</dc:date>
            </office:change-info>
            <text:p text:style-name="P27">vous</text:p>
          </text:deletion>
        </text:changed-region>
        <text:changed-region xml:id="ct108432212134816" text:id="ct108432212134816">
          <text:insertion>
            <office:change-info>
              <dc:creator>Auteur inconnu</dc:creator>
              <dc:date>2024-11-24T18:52:34</dc:date>
            </office:change-info>
          </text:insertion>
        </text:changed-region>
        <text:changed-region xml:id="ct108432212135056" text:id="ct108432212135056">
          <text:deletion>
            <office:change-info>
              <dc:creator>Auteur inconnu</dc:creator>
              <dc:date>2024-11-24T18:50:43</dc:date>
            </office:change-info>
            <text:p text:style-name="P27">devez</text:p>
          </text:deletion>
        </text:changed-region>
        <text:changed-region xml:id="ct108432212135296" text:id="ct108432212135296">
          <text:insertion>
            <office:change-info>
              <dc:creator>Auteur inconnu</dc:creator>
              <dc:date>2024-11-24T18:50:43</dc:date>
            </office:change-info>
          </text:insertion>
        </text:changed-region>
        <text:changed-region xml:id="ct108432212135536" text:id="ct108432212135536">
          <text:deletion>
            <office:change-info>
              <dc:creator>Auteur inconnu</dc:creator>
              <dc:date>2024-11-24T18:50:52</dc:date>
            </office:change-info>
            <text:p text:style-name="P27"><text:s/>créer un </text:p>
          </text:deletion>
        </text:changed-region>
        <text:changed-region xml:id="ct108432212135776" text:id="ct108432212135776">
          <text:deletion>
            <office:change-info>
              <dc:creator>Auteur inconnu</dc:creator>
              <dc:date>2024-11-24T16:09:09</dc:date>
            </office:change-info>
            <text:p text:style-name="P27">Dynamic Web Project</text:p>
          </text:deletion>
        </text:changed-region>
        <text:changed-region xml:id="ct108432212136016" text:id="ct108432212136016">
          <text:insertion>
            <office:change-info>
              <dc:creator>Auteur inconnu</dc:creator>
              <dc:date>2024-11-24T16:09:09</dc:date>
            </office:change-info>
          </text:insertion>
        </text:changed-region>
        <text:changed-region xml:id="ct108432212136256" text:id="ct108432212136256">
          <text:insertion>
            <office:change-info>
              <dc:creator>Auteur inconnu</dc:creator>
              <dc:date>2024-11-24T18:50:54</dc:date>
            </office:change-info>
          </text:insertion>
        </text:changed-region>
        <text:changed-region xml:id="ct108432212136496" text:id="ct108432212136496">
          <text:insertion>
            <office:change-info>
              <dc:creator>Auteur inconnu</dc:creator>
              <dc:date>2024-11-24T18:53:14</dc:date>
            </office:change-info>
          </text:insertion>
        </text:changed-region>
        <text:changed-region xml:id="ct108432212136928" text:id="ct108432212136928">
          <text:deletion>
            <office:change-info>
              <dc:creator>Auteur inconnu</dc:creator>
              <dc:date>2024-11-24T18:52:39</dc:date>
            </office:change-info>
            <text:p text:style-name="P27"><text:span text:style-name="T15">V</text:span>ous pouvez vous inspirer du projet qui vous a été donné dans la partie 1).</text:p>
          </text:deletion>
        </text:changed-region>
        <text:changed-region xml:id="ct108432212138144" text:id="ct108432212138144">
          <text:insertion>
            <office:change-info>
              <dc:creator>Auteur inconnu</dc:creator>
              <dc:date>2024-11-24T16:09:59</dc:date>
            </office:change-info>
          </text:insertion>
        </text:changed-region>
        <text:changed-region xml:id="ct108432212138384" text:id="ct108432212138384">
          <text:insertion>
            <office:change-info>
              <dc:creator>Auteur inconnu</dc:creator>
              <dc:date>2024-11-24T18:53:34</dc:date>
            </office:change-info>
          </text:insertion>
        </text:changed-region>
        <text:changed-region xml:id="ct108432211807184" text:id="ct108432211807184">
          <text:insertion>
            <office:change-info>
              <dc:creator>Auteur inconnu</dc:creator>
              <dc:date>2024-11-24T17:52:47</dc:date>
            </office:change-info>
          </text:insertion>
        </text:changed-region>
        <text:changed-region xml:id="ct108432211765088" text:id="ct108432211765088">
          <text:deletion>
            <office:change-info>
              <dc:creator>Auteur inconnu</dc:creator>
              <dc:date>2024-11-24T16:09:59</dc:date>
            </office:change-info>
            <text:p text:style-name="P27"><text:s/>Il vous faudra notamment :</text:p>
          </text:deletion>
        </text:changed-region>
        <text:changed-region xml:id="ct108432211776912" text:id="ct108432211776912">
          <text:deletion>
            <office:change-info>
              <dc:creator>Auteur inconnu</dc:creator>
              <dc:date>2024-11-24T17:54:08</dc:date>
            </office:change-info>
            <text:p text:style-name="P27"/>
            <text:p text:style-name="P69">- <text:span text:style-name="T12">copier le web.xml présent dans WebContent/WEB-INF</text:span></text:p>
            <text:p text:style-name="P69">- <text:span text:style-name="T12">copier et adapter la classe RespApp qui est référencée depuis web.xml. Cette classe enregistre l’objet appelable avec l’API REST.</text:span></text:p>
            <text:p text:style-name="P69">- <text:span text:style-name="T12">créer la classe implantant votre service et l’annoter.</text:span></text:p>
            <text:p text:style-name="P50">Vous pouvez <text:span text:style-name="T21">installer votre nouveau WS (dans Tomcat) et le </text:span>tester avec l’URL ci-dessus.</text:p>
          </text:deletion>
        </text:changed-region>
        <text:changed-region xml:id="ct108432211801120" text:id="ct108432211801120">
          <text:insertion>
            <office:change-info>
              <dc:creator>Auteur inconnu</dc:creator>
              <dc:date>2024-11-24T18:55:26</dc:date>
            </office:change-info>
          </text:insertion>
        </text:changed-region>
        <text:changed-region xml:id="ct108432211802256" text:id="ct108432211802256">
          <text:deletion>
            <office:change-info>
              <dc:creator>Auteur inconnu</dc:creator>
              <dc:date>2024-11-24T18:55:53</dc:date>
            </office:change-info>
            <text:p text:style-name="P6"><text:span text:style-name="T12">Une autre façon de tester votre WS est d’utiliser </text:span>une petite page </text:p>
          </text:deletion>
        </text:changed-region>
        <text:changed-region xml:id="ct108432211802624" text:id="ct108432211802624">
          <text:deletion>
            <office:change-info>
              <dc:creator>Auteur inconnu</dc:creator>
              <dc:date>2024-11-24T18:55:58</dc:date>
            </office:change-info>
            <text:p text:style-name="P6"><text:span text:style-name="T12">que</text:span></text:p>
          </text:deletion>
        </text:changed-region>
        <text:changed-region xml:id="ct108432211804528" text:id="ct108432211804528">
          <text:insertion>
            <office:change-info>
              <dc:creator>Auteur inconnu</dc:creator>
              <dc:date>2024-11-24T18:55:58</dc:date>
            </office:change-info>
          </text:insertion>
        </text:changed-region>
        <text:changed-region xml:id="ct108432211805744" text:id="ct108432211805744">
          <text:insertion>
            <office:change-info>
              <dc:creator>Auteur inconnu</dc:creator>
              <dc:date>2024-11-24T18:56:00</dc:date>
            </office:change-info>
          </text:insertion>
        </text:changed-region>
        <text:changed-region xml:id="ct108432211763952" text:id="ct108432211763952">
          <text:deletion>
            <office:change-info>
              <dc:creator>Auteur inconnu</dc:creator>
              <dc:date>2024-11-24T18:56:16</dc:date>
            </office:change-info>
            <text:p text:style-name="P6"><text:span text:style-name="T12"><text:s/>nous vous donnons) </text:span></text:p>
          </text:deletion>
        </text:changed-region>
        <text:changed-region xml:id="ct108432212117392" text:id="ct108432212117392">
          <text:insertion>
            <office:change-info>
              <dc:creator>Auteur inconnu</dc:creator>
              <dc:date>2024-11-24T18:56:17</dc:date>
            </office:change-info>
          </text:insertion>
        </text:changed-region>
        <text:changed-region xml:id="ct108432212096512" text:id="ct108432212096512">
          <text:deletion>
            <office:change-info>
              <dc:creator>Auteur inconnu</dc:creator>
              <dc:date>2024-11-24T18:56:22</dc:date>
            </office:change-info>
            <text:p text:style-name="P6">incluant</text:p>
          </text:deletion>
        </text:changed-region>
        <text:changed-region xml:id="ct108432212140512" text:id="ct108432212140512">
          <text:insertion>
            <office:change-info>
              <dc:creator>Auteur inconnu</dc:creator>
              <dc:date>2024-11-24T18:56:22</dc:date>
            </office:change-info>
          </text:insertion>
        </text:changed-region>
        <text:changed-region xml:id="ct108432211795472" text:id="ct108432211795472">
          <text:insertion>
            <office:change-info>
              <dc:creator>Auteur inconnu</dc:creator>
              <dc:date>2024-11-24T18:57:02</dc:date>
            </office:change-info>
          </text:insertion>
        </text:changed-region>
        <text:changed-region xml:id="ct108432211786496" text:id="ct108432211786496">
          <text:deletion>
            <office:change-info>
              <dc:creator>Auteur inconnu</dc:creator>
              <dc:date>2024-11-24T18:57:38</dc:date>
            </office:change-info>
            <text:p text:style-name="P6"><text:s/>une sé<text:span text:style-name="T12">qu</text:span>ence de code JavaScript faisant appel à cette API REST + Json. Installez <text:span text:style-name="T16">(la copier dans </text:span></text:p>
          </text:deletion>
        </text:changed-region>
        <text:changed-region xml:id="ct108432211765392" text:id="ct108432211765392">
          <text:deletion>
            <office:change-info>
              <dc:creator>Auteur inconnu</dc:creator>
              <dc:date>2024-11-24T17:54:32</dc:date>
            </office:change-info>
            <text:p text:style-name="P6"><text:span text:style-name="T16">WebContent</text:span></text:p>
          </text:deletion>
        </text:changed-region>
        <text:changed-region xml:id="ct108432212141728" text:id="ct108432212141728">
          <text:insertion>
            <office:change-info>
              <dc:creator>Auteur inconnu</dc:creator>
              <dc:date>2024-11-24T18:57:41</dc:date>
            </office:change-info>
          </text:insertion>
        </text:changed-region>
        <text:changed-region xml:id="ct108432212097568" text:id="ct108432212097568">
          <text:insertion>
            <office:change-info>
              <dc:creator>Auteur inconnu</dc:creator>
              <dc:date>2024-11-24T17:54:32</dc:date>
            </office:change-info>
          </text:insertion>
        </text:changed-region>
        <text:changed-region xml:id="ct108432212141968" text:id="ct108432212141968">
          <text:insertion>
            <office:change-info>
              <dc:creator>Auteur inconnu</dc:creator>
              <dc:date>2024-11-24T17:55:20</dc:date>
            </office:change-info>
          </text:insertion>
        </text:changed-region>
        <text:changed-region xml:id="ct108432212143024" text:id="ct108432212143024">
          <text:deletion>
            <office:change-info>
              <dc:creator>Auteur inconnu</dc:creator>
              <dc:date>2024-11-24T18:57:51</dc:date>
            </office:change-info>
            <text:p text:style-name="P6">et</text:p>
          </text:deletion>
        </text:changed-region>
        <text:changed-region xml:id="ct108432212143264" text:id="ct108432212143264">
          <text:insertion>
            <office:change-info>
              <dc:creator>Auteur inconnu</dc:creator>
              <dc:date>2024-11-24T18:57:51</dc:date>
            </office:change-info>
          </text:insertion>
        </text:changed-region>
        <text:changed-region xml:id="ct108432212143712" text:id="ct108432212143712">
          <text:deletion>
            <office:change-info>
              <dc:creator>Auteur inconnu</dc:creator>
              <dc:date>2024-11-24T18:57:55</dc:date>
            </office:change-info>
            <text:p text:style-name="P6">ez</text:p>
          </text:deletion>
        </text:changed-region>
        <text:changed-region xml:id="ct108432212145424" text:id="ct108432212145424">
          <text:insertion>
            <office:change-info>
              <dc:creator>Auteur inconnu</dc:creator>
              <dc:date>2024-11-24T18:57:57</dc:date>
            </office:change-info>
          </text:insertion>
        </text:changed-region>
        <text:changed-region xml:id="ct108432212145872" text:id="ct108432212145872">
          <text:insertion>
            <office:change-info>
              <dc:creator>Auteur inconnu</dc:creator>
              <dc:date>2024-11-24T18:58:00</dc:date>
            </office:change-info>
          </text:insertion>
        </text:changed-region>
        <text:changed-region xml:id="ct108432212147184" text:id="ct108432212147184">
          <text:deletion>
            <office:change-info>
              <dc:creator>Auteur inconnu</dc:creator>
              <dc:date>2024-11-24T18:58:04</dc:date>
            </office:change-info>
            <text:p text:style-name="P6"><text:s/>avec cette page</text:p>
          </text:deletion>
        </text:changed-region>
        <text:changed-region xml:id="ct108432212147856" text:id="ct108432212147856">
          <text:deletion>
            <office:change-info>
              <dc:creator>Auteur inconnu</dc:creator>
              <dc:date>2024-11-24T18:22:23</dc:date>
            </office:change-info>
            <text:p text:style-name="P70">‍<draw:frame draw:style-name="fr1" draw:name="Image1" text:anchor-type="char" svg:x="0.189cm" svg:y="0.434cm" svg:width="8.211cm" svg:height="4.015cm" draw:z-index="1"><draw:image xlink:href="Pictures/10000001000002470000011DC5D2BE66E7E57C4A.png" xlink:type="simple" xlink:show="embed" xlink:actuate="onLoad" draw:mime-type="image/png"/></draw:frame>‍</text:p>
          </text:deletion>
        </text:changed-region>
        <text:changed-region xml:id="ct108432212140272" text:id="ct108432212140272">
          <text:insertion>
            <office:change-info>
              <dc:creator>Auteur inconnu</dc:creator>
              <dc:date>2024-11-24T18:22:50</dc:date>
            </office:change-info>
          </text:insertion>
        </text:changed-region>
        <text:changed-region xml:id="ct108432211822960" text:id="ct108432211822960">
          <text:deletion>
            <office:change-info>
              <dc:creator>Auteur inconnu</dc:creator>
              <dc:date>2025-01-06T17:50:28</dc:date>
            </office:change-info>
            <text:p text:style-name="P70"/>
            <text:p text:style-name="P1"/>
          </text:deletion>
        </text:changed-region>
        <text:changed-region xml:id="ct108432211823328" text:id="ct108432211823328">
          <text:deletion>
            <office:change-info>
              <dc:creator>Auteur inconnu</dc:creator>
              <dc:date>2024-11-24T18:23:08</dc:date>
            </office:change-info>
            <text:p text:style-name="P1"/>
            <text:p text:style-name="P1"/>
            <text:p text:style-name="P1"/>
            <text:p text:style-name="P1"/>
            <text:p text:style-name="P1"/>
            <text:p text:style-name="P37"/>
          </text:deletion>
        </text:changed-region>
        <text:changed-region xml:id="ct108432211826672" text:id="ct108432211826672">
          <text:deletion>
            <office:change-info>
              <dc:creator>Auteur inconnu</dc:creator>
              <dc:date>2021-11-25T11:30:35</dc:date>
            </office:change-info>
            <text:p text:style-name="P37"/>
            <text:p text:style-name="P5"/>
            <text:p text:style-name="P38"/>
          </text:deletion>
        </text:changed-region>
        <text:changed-region xml:id="ct108432211827952" text:id="ct108432211827952">
          <text:deletion>
            <office:change-info>
              <dc:creator>Auteur inconnu</dc:creator>
              <dc:date>2024-11-24T18:23:06</dc:date>
            </office:change-info>
            <text:p text:style-name="P38"/>
            <text:p text:style-name="P5"/>
          </text:deletion>
        </text:changed-region>
        <text:changed-region xml:id="ct108432211828320" text:id="ct108432211828320">
          <text:deletion>
            <office:change-info>
              <dc:creator>Auteur inconnu</dc:creator>
              <dc:date>2024-11-24T17:55:48</dc:date>
            </office:change-info>
            <text:p text:style-name="P5"/>
            <text:p text:style-name="P5">Création et test d’un WS SOAP</text:p>
            <text:p text:style-name="P31">Au lieu d’exporter la méthode getmark <text:span text:style-name="T13">sous la forme d’une API REST, nous proposons ici de l’exporter sous la forme d’une API SOAP.</text:span></text:p>
            <text:p text:style-name="P75">Nous repartons d’un projet <text:span text:style-name="T16">DynamicWebProject</text:span> qui inclut une <text:span text:style-name="T14">classe et une </text:span>méthode getMark qui utilise RestEasy (partie cliente) pour faire appel au WS de 1).</text:p>
            <text:p text:style-name="P47"><text:span text:style-name="T13">Pour créer le WS SOAP associé, </text:span>sur la classe : click-droit -&gt; Web Services -&gt; Create Web Service <text:span text:style-name="T20">(</text:span></text:p>
          </text:deletion>
        </text:changed-region>
        <text:changed-region xml:id="ct108432211832320" text:id="ct108432211832320">
          <text:deletion>
            <office:change-info>
              <dc:creator>Auteur inconnu</dc:creator>
              <dc:date>2022-03-25T00:20:30</dc:date>
            </office:change-info>
            <text:p text:style-name="P47"><text:span text:style-name="T20">Develop</text:span></text:p>
          </text:deletion>
        </text:changed-region>
        <text:changed-region xml:id="ct108432212144944" text:id="ct108432212144944">
          <text:deletion>
            <office:change-info>
              <dc:creator>Auteur inconnu</dc:creator>
              <dc:date>2024-11-24T17:55:48</dc:date>
            </office:change-info>
            <text:p text:style-name="P47"><text:span text:style-name="T20"><text:s/>/ No Client)</text:span></text:p>
            <text:p text:style-name="P72"/>
          </text:deletion>
        </text:changed-region>
        <text:changed-region xml:id="ct108432212116944" text:id="ct108432212116944">
          <text:deletion>
            <office:change-info>
              <dc:creator>Auteur inconnu</dc:creator>
              <dc:date>2022-03-25T00:21:58</dc:date>
            </office:change-info>
            <text:p text:style-name="P72">Copiez </text:p>
          </text:deletion>
        </text:changed-region>
        <text:changed-region xml:id="ct108432212142208" text:id="ct108432212142208">
          <text:deletion>
            <office:change-info>
              <dc:creator>Auteur inconnu</dc:creator>
              <dc:date>2024-11-24T17:55:48</dc:date>
            </office:change-info>
            <text:p text:style-name="P72">server-config.wsdd dans WebContent/WEB-INF</text:p>
          </text:deletion>
        </text:changed-region>
        <text:changed-region xml:id="ct108432212142448" text:id="ct108432212142448">
          <text:deletion>
            <office:change-info>
              <dc:creator>Auteur inconnu</dc:creator>
              <dc:date>2022-11-29T11:27:53</dc:date>
            </office:change-info>
            <text:p text:style-name="P72"><text:span text:style-name="T6">e </text:span></text:p>
          </text:deletion>
        </text:changed-region>
        <text:changed-region xml:id="ct108432212142688" text:id="ct108432212142688">
          <text:deletion>
            <office:change-info>
              <dc:creator>Auteur inconnu</dc:creator>
              <dc:date>2022-03-25T00:23:49</dc:date>
            </office:change-info>
            <text:p text:style-name="P72"/>
            <text:p text:style-name="P43">I</text:p>
          </text:deletion>
        </text:changed-region>
        <text:changed-region xml:id="ct108432212148096" text:id="ct108432212148096">
          <text:deletion>
            <office:change-info>
              <dc:creator>Auteur inconnu</dc:creator>
              <dc:date>2022-03-25T00:24:40</dc:date>
            </office:change-info>
            <text:p text:style-name="P43">nstalle</text:p>
          </text:deletion>
        </text:changed-region>
        <text:changed-region xml:id="ct108432212148336" text:id="ct108432212148336">
          <text:deletion>
            <office:change-info>
              <dc:creator>Auteur inconnu</dc:creator>
              <dc:date>2022-03-25T00:23:52</dc:date>
            </office:change-info>
            <text:p text:style-name="P43">z</text:p>
          </text:deletion>
        </text:changed-region>
        <text:changed-region xml:id="ct108432212148576" text:id="ct108432212148576">
          <text:deletion>
            <office:change-info>
              <dc:creator>Auteur inconnu</dc:creator>
              <dc:date>2022-03-25T00:24:39</dc:date>
            </office:change-info>
            <text:p text:style-name="P43"><text:s/>c</text:p>
          </text:deletion>
        </text:changed-region>
        <text:changed-region xml:id="ct108432212148816" text:id="ct108432212148816">
          <text:deletion>
            <office:change-info>
              <dc:creator>Auteur inconnu</dc:creator>
              <dc:date>2024-11-24T17:55:48</dc:date>
            </office:change-info>
            <text:p text:style-name="P43">WS</text:p>
          </text:deletion>
        </text:changed-region>
        <text:changed-region xml:id="ct108432212149056" text:id="ct108432212149056">
          <text:deletion>
            <office:change-info>
              <dc:creator>Auteur inconnu</dc:creator>
              <dc:date>2022-03-25T00:24:46</dc:date>
            </office:change-info>
            <text:p text:style-name="P43"><text:s/><text:span text:style-name="T21">SOAP</text:span></text:p>
          </text:deletion>
        </text:changed-region>
        <text:changed-region xml:id="ct108432212149296" text:id="ct108432212149296">
          <text:deletion>
            <office:change-info>
              <dc:creator>Auteur inconnu</dc:creator>
              <dc:date>2024-11-24T17:55:48</dc:date>
            </office:change-info>
            <text:p text:style-name="P43"><text:span text:style-name="T21"><text:s/></text:span>dans votre Tomcat <text:span text:style-name="T16">(export WAR)</text:span></text:p>
            <text:p text:style-name="P43"><text:span text:style-name="T14">Ensuite, pour tester votre WS SOAP, </text:span>sur le fichier WSDL : click droit -&gt; Web Services -&gt; Test with Web Services Explorer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TP </text:span><text:span text:style-name="T3">Web Services</text:span></text:p>
      <text:p text:style-name="P21">Daniel Hagimont <text:change-start text:change-id="ct108432211495088"/><text:span text:style-name="T33">(</text:span><text:change-end text:change-id="ct108432211495088"/><text:change text:change-id="ct108432211489856"/><text:change-start text:change-id="ct108432211498080"/><text:span text:style-name="T32">daniel</text:span><text:change-end text:change-id="ct108432211498080"/><text:change text:change-id="ct108432211546784"/><text:change-start text:change-id="ct108432211958944"/><text:span text:style-name="T1">.</text:span><text:change-end text:change-id="ct108432211958944"/><text:change-start text:change-id="ct108432211960544"/><text:span text:style-name="T32">h</text:span><text:change-end text:change-id="ct108432211960544"/>agimont@<text:change text:change-id="ct108432211960960"/><text:change-start text:change-id="ct108432211962448"/><text:span text:style-name="T32">irit</text:span><text:change-end text:change-id="ct108432211962448"/>.fr<text:change-start text:change-id="ct108432211963872"/><text:span text:style-name="T33">)</text:span><text:change-end text:change-id="ct108432211963872"/></text:p>
      <text:p text:style-name="P20"/>
      <text:p text:style-name="P28"><text:change text:change-id="ct108432211965408"/><text:change text:change-id="ct108432211965888"/><text:change text:change-id="ct108432211966128"/><text:change-start text:change-id="ct108432211966368"/>The objective of this lab is to introduce the use of Web Services (WS). We will be working with WS in REST mode.<text:change-end text:change-id="ct108432211966368"/><text:change-start text:change-id="ct108432211965648"/></text:p>
      <text:p text:style-name="P12"><text:span text:style-name="T24">0</text:span><text:span text:style-name="T25">) </text:span><text:span text:style-name="T24">Installs</text:span></text:p>
      <text:p text:style-name="P15"><text:change-end text:change-id="ct108432211965648"/><text:change-start text:change-id="ct108432211967456"/>I assume that <text:span text:style-name="T41">v</text:span>s<text:span text:style-name="T41">c</text:span>ode and <text:span text:style-name="T41">j</text:span>ava (JDK 17) are properly installed.<text:line-break/>To install Tomcat:<text:change-end text:change-id="ct108432211967456"/><text:change-start text:change-id="ct108432211968128"/></text:p>
      <text:p text:style-name="P13">cd</text:p>
      <text:p text:style-name="P13">mkdir ws</text:p>
      <text:p text:style-name="P13">cd ws</text:p>
      <text:p text:style-name="P13">wget https://hagimont.freeboxos.fr/hagimont/software/apache-tomcat-11.0.1.tar.gz</text:p>
      <text:p text:style-name="P14">tar xzf apache-tomcat-11.0.1.tar.gz</text:p>
      <text:p text:style-name="P13"># <text:span text:style-name="T41">edit</text:span> <text:span text:style-name="T41">your</text:span> .bashrc <text:span text:style-name="T41">and add</text:span></text:p>
      <text:p text:style-name="P14"><text:tab/>export TOMCAT_HOME=$HOME/ws/apache-tomcat-11.0.1</text:p>
      <text:p text:style-name="P13"><text:tab/>export PATH=$TOMCAT_HOME/bin:$PATH</text:p>
      <text:p text:style-name="P19">Create a new terminal to take into account the modifications in your .bashrc</text:p>
      <text:p text:style-name="P18">To start or stop tomcat from a terminal:</text:p>
      <text:p text:style-name="P13"><text:tab/>startup.sh</text:p>
      <text:p text:style-name="P13"><text:tab/>shutdown.sh<text:change-end text:change-id="ct108432211968128"/><text:change-start text:change-id="ct108432211980000"/></text:p>
      <text:p text:style-name="P16">U<text:span text:style-name="T41">nder</text:span> vscode, <text:span text:style-name="T41">to use</text:span> Spring-boot :</text:p>
      <text:p text:style-name="P24"><text:span text:style-name="T48"><text:tab/>install </text:span><text:span text:style-name="T49">this extension</text:span><text:span text:style-name="T48">: spring initializr java support </text:span><text:change-end text:change-id="ct108432211980000"/><text:change text:change-id="ct108432211980752"/><text:change text:change-id="ct108432211981424"/><text:change text:change-id="ct108432211624992"/><text:change text:change-id="ct108432211981664"/><text:change text:change-id="ct108432211982160"/></text:p>
      <text:p text:style-name="P35"><text:span text:style-name="T25">1) </text:span><text:change text:change-id="ct108432211958384"/><text:change text:change-id="ct108432211959264"/><text:change-start text:change-id="ct108432211961456"/><text:span text:style-name="T28">Creating a WS with</text:span><text:change-end text:change-id="ct108432211961456"/><text:change-start text:change-id="ct108432211956736"/><text:span text:style-name="T27"> Spring-boot</text:span><text:change-end text:change-id="ct108432211956736"/><text:change text:change-id="ct108432211983440"/><text:change text:change-id="ct108432211984048"/><text:change text:change-id="ct108432211645856"/><text:change-start text:change-id="ct108432211646224"/></text:p>
      <text:p text:style-name="P3"><text:change-end text:change-id="ct108432211646224"/><text:change-start text:change-id="ct108432211985728"/>A REST W<text:span text:style-name="T43">S</text:span> has been implemented. It is deployed on a machine in the cloud and is available at the following address:<text:change-end text:change-id="ct108432211985728"/><text:change-start text:change-id="ct108432211987440"/></text:p>
      <text:p text:style-name="P42">http://hagimont.freeboxos.fr:8081/students-server</text:p>
      <text:p text:style-name="P4"><text:change-end text:change-id="ct108432211987440"/><text:change-start text:change-id="ct108432211987728"/>It <text:span text:style-name="T42">provides</text:span> two interfaces:<text:change-end text:change-id="ct108432211987728"/><text:change-start text:change-id="ct108432211996480"/></text:p>
      <text:p text:style-name="P4">M<text:span text:style-name="T42">e</text:span>thod <text:span text:style-name="T7">getstudent</text:span>, <text:span text:style-name="T42">parameters</text:span> <text:span text:style-name="T7">firstname</text:span> <text:span text:style-name="T42">and</text:span> <text:span text:style-name="T7">lastname</text:span>, <text:span text:style-name="T42">returns a</text:span> <text:span text:style-name="T7">Json</text:span>.</text:p>
      <text:p text:style-name="P7"><text:span text:style-name="T42">Call example</text:span>:</text:p>
      <text:p text:style-name="P40"><text:change-end text:change-id="ct108432211996480"/><text:change text:change-id="ct108432211996720"/><text:change-start text:change-id="ct108432160250352"/>http://hagimont.freeboxos.fr:8081<text:change-end text:change-id="ct108432160250352"/><text:change-start text:change-id="ct108432211997232"/>/students-server/getstudent?firstname=Alain&amp;lastname=Tchana<text:change-end text:change-id="ct108432211997232"/><text:change text:change-id="ct108432211997680"/><text:change text:change-id="ct108432211997920"/><text:change text:change-id="ct108432211998160"/></text:p>
      <text:p text:style-name="Standard">{<text:change-start text:change-id="ct108432242213776"/> <text:s text:c="68"/><text:change-end text:change-id="ct108432242213776"/></text:p>
      <text:p text:style-name="Standard"><text:tab/>"firstname":"Alain",</text:p>
      <text:p text:style-name="Standard"><text:tab/>"lastname":"Tchana",</text:p>
      <text:p text:style-name="Standard"><text:tab/>"birthdate":"18/12/1984",</text:p>
      <text:p text:style-name="Standard"><text:tab/>"sex":"male",</text:p>
      <text:p text:style-name="Standard"><text:tab/>"address":"3 rue Jeff Rouchon",</text:p>
      <text:p text:style-name="Standard"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soft-page-break/><text:tab/>"email":"alain.tchana@enseeiht.fr",</text:p>
      <text:p text:style-name="Standard"><text:tab/>"ine":"1111111111"</text:p>
      <text:p text:style-name="Standard">}<text:change text:change-id="ct108432211958624"/></text:p>
      <text:p text:style-name="P2">M<text:change-start text:change-id="ct108432212005504"/><text:span text:style-name="T42">e</text:span><text:change-end text:change-id="ct108432212005504"/><text:change text:change-id="ct108432212005744"/>thod<text:change text:change-id="ct108432212005984"/><text:change-start text:change-id="ct108432212006224"/> <text:change-end text:change-id="ct108432212006224"/><text:span text:style-name="T7">get</text:span><text:span text:style-name="T8">record</text:span><text:change-start text:change-id="ct108432212007616"/><text:span text:style-name="T8">,</text:span><text:change-end text:change-id="ct108432212007616"/> param<text:change-start text:change-id="ct108432212008864"/><text:span text:style-name="T42">eter</text:span><text:change-end text:change-id="ct108432212008864"/><text:change text:change-id="ct108432212009440"/> <text:span text:style-name="T8">ine,</text:span> <text:change text:change-id="ct108432212010640"/><text:change-start text:change-id="ct108432212012160"/><text:span text:style-name="T42">returns</text:span><text:change-end text:change-id="ct108432212012160"/> <text:change text:change-id="ct108432212012736"/><text:change-start text:change-id="ct108432212013920"/><text:span text:style-name="T42">a</text:span><text:change-end text:change-id="ct108432212013920"/> <text:span text:style-name="T7">Json</text:span>.</text:p>
      <text:p text:style-name="P6"><text:change-start text:change-id="ct108432211961952"/><text:span text:style-name="T42">Call</text:span><text:change-end text:change-id="ct108432211961952"/><text:change text:change-id="ct108432212016160"/><text:change-start text:change-id="ct108432212016400"/> <text:span text:style-name="T42">exa</text:span><text:change-end text:change-id="ct108432212016400"/>mple<text:change text:change-id="ct108432212016640"/>:<text:change-start text:change-id="ct108432212017616"/></text:p>
      <text:p text:style-name="P65"><text:span text:style-name="T4">http://hagimont.freeboxos.fr:8081</text:span>/students-server<text:change-end text:change-id="ct108432212017616"/><text:change text:change-id="ct108432212017856"/><text:span text:style-name="T4">/getrecord?ine=1111111111</text:span>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text:change text:change-id="ct108432212024720"/><text:change-start text:change-id="ct108432212025696"/></text:p>
      <text:p text:style-name="P24">Test <text:span text:style-name="T42">this online</text:span> WS<text:change-end text:change-id="ct108432212025696"/><text:change-start text:change-id="ct108432212025936"/> <text:span text:style-name="T42">with your web browser.</text:span><text:change-end text:change-id="ct108432212025936"/></text:p>
      <text:p text:style-name="P23">Recr<text:change-start text:change-id="ct108432212026912"/><text:span text:style-name="T42">eate</text:span><text:change-end text:change-id="ct108432212026912"/><text:change text:change-id="ct108432212027152"/><text:change-start text:change-id="ct108432212027392"/> <text:span text:style-name="T42">this project with spring-boot in vscode</text:span><text:change-end text:change-id="ct108432212027392"/><text:change text:change-id="ct108432212027632"/><text:change text:change-id="ct108432212027872"/><text:change text:change-id="ct108432211686816"/><text:change text:change-id="ct108432211979584"/><text:change-start text:change-id="ct108432211989904"/><text:span text:style-name="T34">. </text:span><text:span text:style-name="T42">The sources of the classes are given in the </text:span><text:span text:style-name="T39">students-server-src </text:span><text:span text:style-name="T42">folder</text:span><text:span text:style-name="T39">.</text:span></text:p>
      <text:p text:style-name="P23"><text:change-end text:change-id="ct108432211989904"/><text:change text:change-id="ct108432212030480"/><text:change text:change-id="ct108432212030720"/><text:change text:change-id="ct108432212030960"/><text:change text:change-id="ct108432212031200"/><text:change text:change-id="ct108432212031440"/><text:change text:change-id="ct108432212031680"/><text:change-start text:change-id="ct108432212031920"/><text:tab/><text:change-end text:change-id="ct108432212031920"/><text:change-start text:change-id="ct108432212032160"/><text:span text:style-name="T42">Create</text:span><text:change-end text:change-id="ct108432212032160"/><text:change-start text:change-id="ct108432212035344"/><text:span text:style-name="T34"> Spring-boot </text:span><text:span text:style-name="T42">project</text:span><text:span text:style-name="T34">: </text:span></text:p>
      <text:p text:style-name="P17"><text:tab/><text:tab/><text:tab/>View -&gt; Command Palette </text:p>
      <text:p text:style-name="P17"><text:tab/><text:tab/><text:tab/>-&gt; Spring initializ : Create a Maven Project</text:p>
      <text:p text:style-name="P17"><text:tab/><text:tab/><text:tab/>-&gt; 3.4.<text:span text:style-name="T52">1</text:span> -&gt; Java -&gt; n7 -&gt; students-server -&gt; War -&gt; 17 </text:p>
      <text:p text:style-name="P17"><text:tab/><text:tab/><text:tab/>-&gt; Selected 0 dependencies<text:change-end text:change-id="ct108432212035344"/></text:p>
      <text:p text:style-name="P11"><text:change-start text:change-id="ct108432212037104"/><text:tab/><text:span text:style-name="T47">Select the location where the project is created. Then, open the created project.</text:span></text:p>
      <text:p text:style-name="P11"><text:span text:style-name="T34"><text:tab/>Cop</text:span><text:span text:style-name="T42">y</text:span><text:span text:style-name="T34"> classes </text:span><text:change-end text:change-id="ct108432212037104"/><text:change-start text:change-id="ct108432212038544"/><text:span text:style-name="T34">Student, Record </text:span><text:span text:style-name="T42">and</text:span><text:span text:style-name="T34"> StudentsController </text:span><text:span text:style-name="T42">in</text:span><text:span text:style-name="T39"> src/main/java/n7/students_server/</text:span></text:p>
      <text:p text:style-name="P25">Ex<text:span text:style-name="T42">e</text:span>cute <text:span text:style-name="T42">and</text:span> test <text:span text:style-name="T42">this</text:span> <text:change-end text:change-id="ct108432212038544"/><text:change-start text:change-id="ct108432212005184"/>proje<text:span text:style-name="T42">ct</text:span>:</text:p>
      <text:list xml:id="list3653937010" text:style-name="L1">
        <text:list-item>
          <text:p text:style-name="P52"><text:span text:style-name="T42">as a</text:span> standalone application</text:p>
          <text:list>
            <text:list-item>
              <text:p text:style-name="P53"><text:span text:style-name="T42">in the project</text:span>: ./mvnw <text:change-end text:change-id="ct108432212005184"/><text:change-start text:change-id="ct108432212006864"/>s<text:span text:style-name="T52">p</text:span>ring-boot:run</text:p>
            </text:list-item>
            <text:list-item>
              <text:p text:style-name="P54"><text:span text:style-name="T42">it starts your application in a tomcat server</text:span> </text:p>
            </text:list-item>
            <text:list-item>
              <text:p text:style-name="P54">URL: localhost:8080/getstudent….</text:p>
            </text:list-item>
            <text:list-item>
              <text:p text:style-name="P56">NB : in this mode, you don't have the project name in the URL</text:p>
            </text:list-item>
          </text:list>
        </text:list-item>
        <text:list-item>
          <text:p text:style-name="P53"><text:span text:style-name="T42">by exporting a</text:span> war <text:span text:style-name="T42">in a running</text:span> <text:span text:style-name="T42">t</text:span>omcat<text:change-end text:change-id="ct108432212006864"/><text:change-start text:change-id="ct108432212060576"/></text:p>
          <text:list>
            <text:list-item>
              <text:p text:style-name="P53"><text:change-end text:change-id="ct108432212060576"/><text:change-start text:change-id="ct108432212063456"/><text:span text:style-name="T42">in the</text:span><text:change-end text:change-id="ct108432212063456"/><text:change-start text:change-id="ct108432212065040"/><text:span text:style-name="T42"> </text:span><text:change-end text:change-id="ct108432212065040"/><text:change-start text:change-id="ct108432212075920"/>proje<text:span text:style-name="T42">c</text:span>t: ./mvnw package</text:p>
            </text:list-item>
            <text:list-item>
              <text:p text:style-name="P54"><text:span text:style-name="T42">the generated</text:span> war <text:span text:style-name="T42">is located in the</text:span> target <text:span text:style-name="T42">folder</text:span></text:p>
            </text:list-item>
            <text:list-item>
              <text:p text:style-name="P57">start your tomcat (startup.sh)</text:p>
            </text:list-item>
            <text:list-item>
              <text:p text:style-name="P55"><text:span text:style-name="T42">copy the war with the</text:span> students-server.war <text:span text:style-name="T42">name in the </text:span>webapp <text:span text:style-name="T42">folder of your tomcat</text:span></text:p>
            </text:list-item>
            <text:list-item>
              <text:p text:style-name="P54">URL: localhost:8080/students-server/getstudent….</text:p>
            </text:list-item>
            <text:list-item>
              <text:p text:style-name="P56">NB : in this mode, you have the project name in the URL</text:p>
            </text:list-item>
          </text:list>
        </text:list-item>
      </text:list>
      <text:p text:style-name="P33"><text:change-end text:change-id="ct108432212075920"/><text:change-start text:change-id="ct108432212076160"/>You can rely on the slides from the WS lecture.<text:change-end text:change-id="ct108432212076160"/><text:change-start text:change-id="ct108432212083536"/></text:p>
      <text:p text:style-name="P25"/>
      <text:p text:style-name="P25"><text:soft-page-break/></text:p>
      <text:p text:style-name="P36"><text:span text:style-name="T27">2</text:span><text:span text:style-name="T25">) </text:span><text:span text:style-name="T29">Calling a</text:span><text:span text:style-name="T23"> WS </text:span><text:span text:style-name="T29">with</text:span><text:span text:style-name="T27"> RestEasy</text:span><text:change-end text:change-id="ct108432212083536"/><text:change text:change-id="ct108432212084080"/><text:change text:change-id="ct108432212084448"/><text:change text:change-id="ct108432212085392"/><text:change text:change-id="ct108432212085664"/><text:change-start text:change-id="ct108432212086080"/></text:p>
      <text:p text:style-name="P8"><text:change-end text:change-id="ct108432212086080"/><text:change-start text:change-id="ct108432212087072"/>Implement <text:span text:style-name="T43">in </text:span>a Java project a client program that <text:span text:style-name="T43">invokes</text:span> the previously mentioned service (using <text:span text:style-name="T43">r</text:span>esteasy). You need to:<text:change-end text:change-id="ct108432212087072"/><text:change-start text:change-id="ct108432212087856"/></text:p>
      <text:p text:style-name="P8">- <text:span text:style-name="T43">download</text:span><text:span text:style-name="T35"> reasteasy :</text:span></text:p>
      <text:p text:style-name="P8"><text:tab/>https://hagimont.freeboxos.fr/hagimont/software/resteasy-jaxrs-3.0.9.Final-all.zip</text:p>
      <text:p text:style-name="P9"><text:tab/>- <text:change-end text:change-id="ct108432212087856"/><text:change-start text:change-id="ct108432212090688"/><text:span text:style-name="T43">create a</text:span><text:change-end text:change-id="ct108432212090688"/><text:change-start text:change-id="ct108432212090928"/><text:span text:style-name="T40"> Java </text:span><text:span text:style-name="T43">project</text:span><text:span text:style-name="T40"> (students-client) </text:span><text:span text:style-name="T43">in</text:span><text:span text:style-name="T40"> vscode</text:span></text:p>
      <text:p text:style-name="P9"><text:span text:style-name="T30"><text:tab/>- </text:span><text:change-end text:change-id="ct108432212090928"/><text:change-start text:change-id="ct108432212092864"/><text:span text:style-name="T30">inclu</text:span><text:span text:style-name="T43">de in your java project</text:span><text:span text:style-name="T30"> </text:span><text:span text:style-name="T43">(referenced libraries) the</text:span><text:span text:style-name="T35"> resteasy </text:span><text:span text:style-name="T43">jars </text:span><text:span text:style-name="T40">(</text:span><text:span text:style-name="T43">in</text:span><text:span text:style-name="T40"> </text:span><text:span text:style-name="T35">lib)</text:span></text:p>
      <text:p text:style-name="P8"><text:tab/>- <text:span text:style-name="T43">create</text:span><text:span text:style-name="T19"> </text:span><text:span text:style-name="T43">the</text:span><text:span text:style-name="T19"> Java beans associ</text:span><text:span text:style-name="T43">ated</text:span><text:span text:style-name="T19"> </text:span><text:span text:style-name="T43">with the used</text:span><text:span text:style-name="T19"> Json </text:span><text:span text:style-name="T35">(Student, Record)</text:span></text:p>
      <text:p text:style-name="P6"><text:change-end text:change-id="ct108432212092864"/><text:change text:change-id="ct108432212102816"/><text:change-start text:change-id="ct108432212103248"/><text:tab/><text:change-end text:change-id="ct108432212103248"/>- <text:change text:change-id="ct108432212103488"/><text:change-start text:change-id="ct108432212103728"/><text:span text:style-name="T43">describe</text:span><text:change-end text:change-id="ct108432212103728"/><text:span text:style-name="T11"> </text:span><text:change-start text:change-id="ct108432212103968"/><text:span text:style-name="T43">the</text:span><text:change-end text:change-id="ct108432212103968"/><text:change text:change-id="ct108432212104208"/><text:change-start text:change-id="ct108432212104448"/><text:span text:style-name="T11"> </text:span><text:span text:style-name="T43">service </text:span><text:change-end text:change-id="ct108432212104448"/><text:span text:style-name="T11">interface </text:span><text:change text:change-id="ct108432212104688"/><text:change-start text:change-id="ct108432212104928"/><text:span text:style-name="T43">with</text:span><text:change-end text:change-id="ct108432212104928"/><text:span text:style-name="T11"> annotations @GET, @Path, @Produces …</text:span><text:change text:change-id="ct108432212105168"/></text:p>
      <text:p text:style-name="P26"><text:change text:change-id="ct108432212105408"/><text:change text:change-id="ct108432212106048"/><text:change text:change-id="ct108432212106288"/><text:change-start text:change-id="ct108432212106736"/><text:span text:style-name="T12"><text:tab/></text:span><text:change-end text:change-id="ct108432212106736"/><text:span text:style-name="T12">- </text:span><text:change text:change-id="ct108432212107168"/><text:change-start text:change-id="ct108432212107408"/><text:span text:style-name="T43">create and use the resteasy proxy</text:span><text:change-end text:change-id="ct108432212107408"/><text:change text:change-id="ct108432212107648"/><text:change-start text:change-id="ct108432212107888"/></text:p>
      <text:p text:style-name="P31"><text:tab/>- <text:span text:style-name="T43">an</text:span><text:span text:style-name="T35"> exemple </text:span><text:span text:style-name="T43">is</text:span><text:span text:style-name="T35"> </text:span><text:span text:style-name="T43">detailed</text:span><text:span text:style-name="T35"> </text:span><text:change-end text:change-id="ct108432212107888"/><text:change-start text:change-id="ct108432212109008"/><text:span text:style-name="T43">in the slides from the WS lecture.</text:span><text:change-end text:change-id="ct108432212109008"/><text:change-start text:change-id="ct108432212109648"/></text:p>
      <text:p text:style-name="P32"><text:tab/>- <text:span text:style-name="T46">we provide a script (run.sh) to execute </text:span><text:change-end text:change-id="ct108432212109648"/><text:change-start text:change-id="ct108432212110432"/><text:span text:style-name="T46">the resteasy client (update it if necessary)</text:span><text:change-end text:change-id="ct108432212110432"/><text:change-start text:change-id="ct108432212110880"/><text:span text:style-name="T46">, </text:span><text:span text:style-name="T51">or you can run the application in vscode</text:span><text:change-end text:change-id="ct108432212110880"/></text:p>
      <text:p text:style-name="P1"/>
      <text:p text:style-name="P5"><text:change-start text:change-id="ct108432212094880"/><text:span text:style-name="T35">3</text:span><text:change-end text:change-id="ct108432212094880"/><text:change text:change-id="ct108432212081136"/><text:span text:style-name="T10">) </text:span><text:change text:change-id="ct108432212082032"/><text:change-start text:change-id="ct108432212093360"/><text:span text:style-name="T35">D</text:span><text:span text:style-name="T43">e</text:span><text:span text:style-name="T35">velop </text:span><text:span text:style-name="T43">a</text:span><text:span text:style-name="T35"> </text:span><text:change-end text:change-id="ct108432212093360"/><text:change-start text:change-id="ct108432212111616"/><text:span text:style-name="T43">new</text:span><text:change-end text:change-id="ct108432212111616"/> <text:change text:change-id="ct108432212111936"/>WS<text:change text:change-id="ct108432212112256"/><text:change text:change-id="ct108432212112496"/></text:p>
      <text:p text:style-name="P10"><text:change text:change-id="ct108432212113568"/><text:change-start text:change-id="ct108432212113808"/><text:span text:style-name="T43">Create</text:span><text:change-end text:change-id="ct108432212113808"/> <text:change text:change-id="ct108432211753296"/><text:change-start text:change-id="ct108432212082272"/><text:span text:style-name="T43">a</text:span><text:change-end text:change-id="ct108432212082272"/> <text:change-start text:change-id="ct108432212096128"/><text:span text:style-name="T43">REST</text:span><text:change-end text:change-id="ct108432212096128"/><text:change-start text:change-id="ct108432212093872"/><text:span text:style-name="T43"> </text:span><text:change-end text:change-id="ct108432212093872"/>WS<text:change text:change-id="ct108432212081728"/><text:change text:change-id="ct108432212094416"/><text:change text:change-id="ct108432212077984"/> <text:change-start text:change-id="ct108432212116256"/><text:span text:style-name="T31">(</text:span><text:span text:style-name="T43">named</text:span><text:span text:style-name="T31"> </text:span><text:span text:style-name="T40">students-</text:span><text:span text:style-name="T31">marks) </text:span><text:change-end text:change-id="ct108432212116256"/><text:change text:change-id="ct108432212116608"/><text:change-start text:change-id="ct108432212117888"/><text:span text:style-name="T43">which returns, from the first</text:span><text:change-end text:change-id="ct108432212117888"/><text:change-start text:change-id="ct108432212119408"/><text:span text:style-name="T43">name/lastname of a student and the name of a lecture</text:span><text:change-end text:change-id="ct108432212119408"/><text:change-start text:change-id="ct108432212120928"/><text:span text:style-name="T43">, the mark that this student obtained in that discipline. This WS is both client (from the previous WS, students-server) and server as it provides an interface:</text:span><text:change-end text:change-id="ct108432212120928"/><text:change text:change-id="ct108432212121200"/><text:change text:change-id="ct108432212121936"/><text:change text:change-id="ct108432212122416"/></text:p>
      <text:p text:style-name="P2">M<text:change text:change-id="ct108432212124000"/><text:change-start text:change-id="ct108432212124240"/>e<text:span text:style-name="T43">t</text:span><text:change-end text:change-id="ct108432212124240"/>hod<text:change text:change-id="ct108432212124480"/> <text:span text:style-name="T7">get</text:span><text:span text:style-name="T8">mark</text:span>, param<text:change-start text:change-id="ct108432212124720"/><text:span text:style-name="T43">eters</text:span><text:change-end text:change-id="ct108432212124720"/><text:change text:change-id="ct108432212124960"/> <text:span text:style-name="T7">firstname,</text:span> <text:span text:style-name="T7">lastname </text:span><text:change-start text:change-id="ct108432212125200"/><text:span text:style-name="T9">and</text:span><text:change-end text:change-id="ct108432212125200"/><text:change text:change-id="ct108432212125440"/><text:span text:style-name="T8"> lecture</text:span>, <text:change text:change-id="ct108432212125824"/><text:change-start text:change-id="ct108432212126064"/><text:span text:style-name="T43">returns</text:span><text:change-end text:change-id="ct108432212126064"/> <text:change text:change-id="ct108432212126304"/><text:change-start text:change-id="ct108432212126544"/><text:span text:style-name="T43">an</text:span><text:change-end text:change-id="ct108432212126544"/> <text:span text:style-name="T8">Integer</text:span>.</text:p>
      <text:p text:style-name="P6"><text:change-start text:change-id="ct108432212127808"/><text:span text:style-name="T43">Call</text:span><text:change-end text:change-id="ct108432212127808"/><text:change text:change-id="ct108432212128048"/><text:change-start text:change-id="ct108432212128288"/> <text:span text:style-name="T43">e</text:span><text:change-end text:change-id="ct108432212128288"/>x<text:change-start text:change-id="ct108432212128528"/><text:span text:style-name="T43">a</text:span><text:change-end text:change-id="ct108432212128528"/><text:change text:change-id="ct108432212128768"/>mple<text:change text:change-id="ct108432212129008"/>:</text:p>
      <text:p text:style-name="P29"><text:change-start text:change-id="ct108432262004112"/><text:span text:style-name="T53">http://localhost:8080/</text:span><text:change-end text:change-id="ct108432262004112"/><text:change text:change-id="ct108432212129984"/><text:change-start text:change-id="ct108432212130224"/><text:span text:style-name="T54">students-</text:span><text:change-end text:change-id="ct108432212130224"/><text:change-start text:change-id="ct108432212130464"/><text:span text:style-name="T55">marks</text:span><text:change-end text:change-id="ct108432212130464"/><text:change-start text:change-id="ct108432160259344"/><text:a xlink:type="simple" xlink:href="http://localhost:8080/students-rest/rest/getmark?firstname=Alain&amp;lastname=Tchana&amp;lecture=systems" text:style-name="Internet_20_link" text:visited-style-name="Visited_20_Internet_20_Link"><text:span text:style-name="T53">/</text:span></text:a><text:change-end text:change-id="ct108432160259344"/><text:change text:change-id="ct108432212130704"/><text:change-start text:change-id="ct108432161543952"/><text:span text:style-name="T53">getmark?firstname=Alain&amp;lastname=Tchana&amp;lecture=systems</text:span><text:change-end text:change-id="ct108432161543952"/></text:p>
      <text:p text:style-name="P41">5<text:change text:change-id="ct108432212131680"/><text:change text:change-id="ct108432212131920"/><text:change-start text:change-id="ct108432212132896"/></text:p>
      <text:p text:style-name="P27"><text:change-end text:change-id="ct108432212132896"/><text:change text:change-id="ct108432212133136"/><text:change-start text:change-id="ct108432212133376"/><text:span text:style-name="T43">To</text:span><text:change-end text:change-id="ct108432212133376"/> impl<text:change-start text:change-id="ct108432212133616"/><text:span text:style-name="T43">ement</text:span><text:change-end text:change-id="ct108432212133616"/><text:change text:change-id="ct108432212133856"/> <text:change text:change-id="ct108432212134096"/><text:change-start text:change-id="ct108432212134336"/><text:span text:style-name="T43">this</text:span><text:change-end text:change-id="ct108432212134336"/> WS, <text:change text:change-id="ct108432212134576"/><text:change-start text:change-id="ct108432212134816"/><text:span text:style-name="T44">you</text:span><text:change-end text:change-id="ct108432212134816"/> <text:change text:change-id="ct108432212135056"/><text:change-start text:change-id="ct108432212135296"/><text:span text:style-name="T43">have to create a new </text:span><text:change-end text:change-id="ct108432212135296"/><text:change text:change-id="ct108432212135536"/><text:change text:change-id="ct108432212135776"/><text:change-start text:change-id="ct108432212136016"/><text:span text:style-name="T35">Spring-boot</text:span><text:change-end text:change-id="ct108432212136016"/><text:change-start text:change-id="ct108432212136256"/><text:span text:style-name="T35"> </text:span><text:span text:style-name="T43">project</text:span><text:change-end text:change-id="ct108432212136256"/>. <text:change-start text:change-id="ct108432212136496"/>You can refer to the project provided in 1<text:span text:style-name="T45">)</text:span> for guidance<text:change-end text:change-id="ct108432212136496"/><text:change text:change-id="ct108432212136928"/><text:change-start text:change-id="ct108432212138144"/></text:p>
      <text:p text:style-name="P30"><text:change-end text:change-id="ct108432212138144"/><text:change-start text:change-id="ct108432212138384"/>To invoke service<text:span text:style-name="T35"> students-server </text:span>from service students-marks, we will use the RestClient API from Spring. An example is detailed in the <text:span text:style-name="T43">slides from the WS lecture.</text:span><text:change-end text:change-id="ct108432212138384"/><text:change-start text:change-id="ct108432211807184"/></text:p>
      <text:p text:style-name="P27"><text:span text:style-name="T36">Impl</text:span><text:span text:style-name="T45">ement this WS and test it with a web browser.</text:span><text:change-end text:change-id="ct108432211807184"/><text:change text:change-id="ct108432211765088"/><text:change text:change-id="ct108432211776912"/></text:p>
      <text:p text:style-name="P6"><text:change-start text:change-id="ct108432211801120"/><text:span text:style-name="T45">Another way to test your WS is to use a little web page </text:span><text:change-end text:change-id="ct108432211801120"/><text:change text:change-id="ct108432211802256"/><text:span text:style-name="T12">(</text:span><text:change text:change-id="ct108432211802624"/><text:change-start text:change-id="ct108432211804528"/><text:span text:style-name="T45">that </text:span><text:change-end text:change-id="ct108432211804528"/><text:change-start text:change-id="ct108432211805744"/><text:span text:style-name="T45">we provides, index.html)</text:span><text:change-end text:change-id="ct108432211805744"/><text:change text:change-id="ct108432211763952"/><text:change-start text:change-id="ct108432212117392"/><text:span text:style-name="T12"> </text:span><text:change-end text:change-id="ct108432212117392"/><text:change text:change-id="ct108432212096512"/><text:change-start text:change-id="ct108432212140512"/><text:span text:style-name="T45">which includes a JavaScript code sequence which invokes this REST API</text:span><text:change-end text:change-id="ct108432212140512"/><text:change-start text:change-id="ct108432211795472"/><text:span text:style-name="T45">. Install this web page in the students-marks project </text:span><text:change-end text:change-id="ct108432211795472"/><text:change text:change-id="ct108432211786496"/><text:change text:change-id="ct108432211765392"/><text:change-start text:change-id="ct108432212141728"/><text:span text:style-name="T45">(in</text:span><text:change-end text:change-id="ct108432212141728"/><text:change-start text:change-id="ct108432212097568"/><text:span text:style-name="T36"> src/</text:span><text:change-end text:change-id="ct108432212097568"/><text:change-start text:change-id="ct108432212141968"/><text:span text:style-name="T36">main/resources/static</text:span><text:change-end text:change-id="ct108432212141968"/><text:span text:style-name="T16">) </text:span><text:change text:change-id="ct108432212143024"/><text:change-start text:change-id="ct108432212143264"/><text:span text:style-name="T45">and</text:span><text:change-end text:change-id="ct108432212143264"/> test<text:change text:change-id="ct108432212143712"/><text:change-start text:change-id="ct108432212145424"/> <text:span text:style-name="T45">it with this pa</text:span><text:change-end text:change-id="ct108432212145424"/><text:change-start text:change-id="ct108432212145872"/><text:span text:style-name="T45">ge</text:span><text:change-end text:change-id="ct108432212145872"/><text:change text:change-id="ct108432212147184"/>.</text:p>
      <text:p text:style-name="P70"><text:change text:change-id="ct108432212147856"/><text:change-start text:change-id="ct108432212140272"/><draw:frame draw:style-name="fr2" draw:name="Image2" text:anchor-type="as-char" svg:y="-4.473cm" svg:width="10.769cm" svg:height="5.029cm" draw:z-index="0"><draw:image xlink:href="Pictures/100000010000026D00000122096CB170A057F25C.png" xlink:type="simple" xlink:show="embed" xlink:actuate="onLoad" draw:mime-type="image/png"/></draw:frame><text:change-end text:change-id="ct108432212140272"/><text:change text:change-id="ct108432211822960"/><text:change text:change-id="ct108432211823328"/><text:change text:change-id="ct108432211826672"/><text:change text:change-id="ct108432211827952"/><text:change text:change-id="ct108432211828320"/><text:change text:change-id="ct108432211832320"/><text:change text:change-id="ct108432212144944"/><text:change text:change-id="ct108432212116944"/><text:change text:change-id="ct108432212142208"/><text:change text:change-id="ct108432212142448"/><text:change text:change-id="ct108432212142688"/><text:change text:change-id="ct108432212148096"/><text:change text:change-id="ct108432212148336"/><text:change text:change-id="ct108432212148576"/><text:change text:change-id="ct108432212148816"/><text:change text:change-id="ct108432212149056"/><text:change text:change-id="ct10843221214929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5-11-22T14:20:09.335795733</dc:date>
    <meta:editing-duration>P1DT4H7M2S</meta:editing-duration>
    <meta:editing-cycles>69</meta:editing-cycles>
    <meta:generator>LibreOffice/7.3.7.2$Linux_X86_64 LibreOffice_project/30$Build-2</meta:generator>
    <meta:document-statistic meta:table-count="0" meta:image-count="2" meta:object-count="0" meta:page-count="3" meta:paragraph-count="96" meta:word-count="658" meta:character-count="4711" meta:non-whitespace-character-count="4040"/>
  </office:meta>
</office:document-meta>
</file>